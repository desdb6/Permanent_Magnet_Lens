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Default" style:data-style-name="N15"/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5.23875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4.70958333333333cm"/>
    </style:style>
    <style:style style:name="co12" style:family="table-column">
      <style:table-column-properties fo:break-before="auto" style:column-width="3.81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16369" table:default-cell-style-name="ce1"/>
        <table:table-row table:style-name="ro1">
          <table:table-cell office:value-type="string" table:style-name="ce2">
            <text:p>Option 1: Parralel beam</text:p>
          </table:table-cell>
          <table:table-cell table:number-columns-repeated="5" table:style-name="ce2"/>
          <table:table-cell office:value-type="string" table:style-name="ce2">
            <text:p>Setup</text:p>
          </table:table-cell>
          <table:table-cell table:number-columns-repeated="7" table:style-name="ce2"/>
          <table:table-cell office:value-type="string" table:style-name="ce2">
            <text:p>Measurements</text:p>
          </table:table-cell>
          <table:table-cell table:number-columns-repeated="16369" table:style-name="ce2"/>
        </table:table-row>
        <table:table-row table:style-name="ro2">
          <table:table-cell table:number-columns-repeated="6" table:style-name="ce2"/>
          <table:table-cell office:value-type="string" table:style-name="ce2">
            <text:p>3<text:span text:style-name="T2">rd</text:span><text:s/>run</text:p>
          </table:table-cell>
          <table:table-cell table:number-columns-repeated="2" table:style-name="ce2"/>
          <table:table-cell office:value-type="string" table:style-name="ce2">
            <text:p>rel</text:p>
          </table:table-cell>
          <table:table-cell office:value-type="string" table:style-name="ce2">
            <text:p>abs</text:p>
          </table:table-cell>
          <table:table-cell table:number-columns-repeated="3" table:style-name="ce2"/>
          <table:table-cell office:value-type="string" table:style-name="ce2">
            <text:p>Lens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style-name="ce2">
            <text:p>43,14</text:p>
          </table:table-cell>
          <table:table-cell table:number-columns-repeated="4"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0" table:style-name="ce2">
            <text:p>0</text:p>
          </table:table-cell>
          <table:table-cell office:value-type="float" office:value="101.08" table:formula="of:=[.K5]-[.J5]" table:style-name="ce2">
            <text:p>101,08</text:p>
          </table:table-cell>
          <table:table-cell office:value-type="float" office:value="89.58" table:formula="of:=[.K3]-11.5" table:style-name="ce2">
            <text:p>89,58</text:p>
          </table:table-cell>
          <table:table-cell table:number-columns-repeated="2" table:style-name="ce2"/>
          <table:table-cell office:value-type="string" table:style-name="ce2">
            <text:p>Thickness</text:p>
          </table:table-cell>
          <table:table-cell office:value-type="float" office:value="8.4" table:style-name="ce2">
            <text:p>8,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,78</text:p>
          </table:table-cell>
          <table:table-cell table:number-columns-repeated="4" table:style-name="ce2"/>
          <table:table-cell office:value-type="string" table:style-name="ce2">
            <text:p>Lens plate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43.14" table:formula="of:=[.P3]/2+[.P7]+4+9+[.H7]+[.P12]" table:style-name="ce2">
            <text:p>43,14</text:p>
          </table:table-cell>
          <table:table-cell office:value-type="float" office:value="144.22" table:formula="of:=[.J4]-[.J5]+[.K5]" table:style-name="ce2">
            <text:p>144,22</text:p>
          </table:table-cell>
          <table:table-cell table:number-columns-repeated="16373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,254</text:p>
          </table:table-cell>
          <table:table-cell table:number-columns-repeated="4" table:style-name="ce2"/>
          <table:table-cell office:value-type="string" table:style-name="ce2">
            <text:p>4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26.92" table:formula="of:=[.J4]+[.P13]+82.64" table:style-name="ce2">
            <text:p>126,92</text:p>
          </table:table-cell>
          <table:table-cell office:value-type="float" office:value="228" table:style-name="ce2">
            <text:p>228</text:p>
          </table:table-cell>
          <table:table-cell table:number-columns-repeated="3" table:style-name="ce2"/>
          <table:table-cell office:value-type="string" table:style-name="ce2">
            <text:p>Lens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,05</text:p>
          </table:table-cell>
          <table:table-cell table:number-columns-repeated="4"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orrection term</text:p>
          </table:table-cell>
          <table:table-cell office:value-type="float" office:value="0" table:style-name="ce2">
            <text:p>0</text:p>
          </table:table-cell>
          <table:table-cell table:number-columns-repeated="4" table:style-name="ce2"/>
          <table:table-cell office:value-type="string" table:style-name="ce2">
            <text:p>Thickness with lens</text:p>
          </table:table-cell>
          <table:table-cell office:value-type="float" office:value="9.24" table:style-name="ce2">
            <text:p>9,2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5]-[.B6]" table:style-name="ce2">
            <text:p>0,204</text:p>
          </table:table-cell>
          <table:table-cell table:number-columns-repeated="4" table:style-name="ce2"/>
          <table:table-cell office:value-type="string" table:style-name="ce2">
            <text:p>gap</text:p>
          </table:table-cell>
          <table:table-cell office:value-type="float" office:value="24.61" table:style-name="ce2">
            <text:p>24,61</text:p>
          </table:table-cell>
          <table:table-cell table:number-columns-repeated="6" table:style-name="ce2"/>
          <table:table-cell office:value-type="string" table:style-name="ce2">
            <text:p>Bottom thickness</text:p>
          </table:table-cell>
          <table:table-cell office:value-type="float" office:value="0.83999999999999986" table:formula="of:=[.P6]-[.P3]" table:style-name="ce2">
            <text:p>0,8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,055</text:p>
          </table:table-cell>
          <table:table-cell table:number-columns-repeated="4"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Total available length</text:p>
          </table:table-cell>
          <table:table-cell office:value-type="float" office:value="228.4" table:style-name="ce2">
            <text:p>228,4</text:p>
          </table:table-cell>
          <table:table-cell table:number-columns-repeated="4" table:style-name="ce2"/>
          <table:table-cell office:value-type="string" table:style-name="ce2">
            <text:p>Plate thickness</text:p>
          </table:table-cell>
          <table:table-cell table:number-columns-repeated="16369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gap</text:p>
          </table:table-cell>
          <table:table-cell table:style-name="ce2"/>
          <table:table-cell office:value-type="string" table:style-name="ce2">
            <text:p>Polepiece to lens</text:p>
          </table:table-cell>
          <table:table-cell office:value-type="float" office:value="101.48" table:formula="of:=[.J8]-[.J5]+[.J6]" table:style-name="ce2">
            <text:p>101,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table:number-columns-repeated="4" table:style-name="ce2"/>
          <table:table-cell office:value-type="string" table:style-name="ce2">
            <text:p>detector</text:p>
          </table:table-cell>
          <table:table-cell table:number-columns-repeated="7" table:style-name="ce2"/>
          <table:table-cell office:value-type="string" table:style-name="ce2">
            <text:p>Grid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86319185188676695" table:formula="of:=[.C126]*1000" table:style-name="ce2">
            <text:p>0,863191852</text:p>
          </table:table-cell>
          <table:table-cell table:number-columns-repeated="12" table:style-name="ce2"/>
          <table:table-cell office:value-type="string" table:style-name="ce2">
            <text:p>Thickness</text:p>
          </table:table-cell>
          <table:table-cell office:value-type="float" office:value="1.63" table:style-name="ce2">
            <text:p>1,63</text:p>
          </table:table-cell>
          <table:table-cell table:number-columns-repeated="16368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Full stack length (top of plate)</text:p>
          </table:table-cell>
          <table:table-cell table:number-columns-repeated="7" table:style-name="ce2"/>
          <table:table-cell office:value-type="string" table:style-name="ce2">
            <text:p>Inset</text:p>
          </table:table-cell>
          <table:table-cell office:value-type="float" office:value="0.49" table:style-name="ce2">
            <text:p>0,49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2313326072880733" table:formula="of:=[.B11]/[.B7]" table:style-name="ce2">
            <text:p>4,231332607</text:p>
          </table:table-cell>
          <table:table-cell table:number-columns-repeated="4" table:style-name="ce2"/>
          <table:table-cell office:value-type="float" office:value="121.73" table:style-name="ce2">
            <text:p>121,73</text:p>
          </table:table-cell>
          <table:table-cell table:number-columns-repeated="7" table:style-name="ce2"/>
          <table:table-cell office:value-type="string" table:style-name="ce2">
            <text:p>Bottom thickness</text:p>
          </table:table-cell>
          <table:table-cell office:value-type="float" office:value="1.1399999999999999" table:formula="of:=[.P11]-[.P12]" table:style-name="ce2">
            <text:p>1,1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25.927383585038363" table:formula="of:=[.B4]/([.B13]-1)" table:style-name="ce2">
            <text:p>25,92738359</text:p>
          </table:table-cell>
          <table:table-cell table:number-columns-repeated="4" table:style-name="ce2"/>
          <table:table-cell office:value-type="string" table:style-name="ce2">
            <text:p>top of grid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17.212616414961637" table:formula="of:=[.B3]-[.B14]" table:style-name="ce2">
            <text:p>17,21261641</text:p>
          </table:table-cell>
          <table:table-cell table:number-columns-repeated="4" table:style-name="ce2"/>
          <table:table-cell office:value-type="float" office:value="82.64" table:style-name="ce2">
            <text:p>82,64</text:p>
          </table:table-cell>
          <table:table-cell table:number-columns-repeated="16377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2">
          <table:table-cell office:value-type="string" table:style-name="ce2">
            <text:p>EXAMPLES WITH SIMULATED DATA</text:p>
          </table:table-cell>
          <table:table-cell table:number-columns-repeated="5" table:style-name="ce2"/>
          <table:table-cell office:value-type="string" table:style-name="ce2">
            <text:p>4<text:span text:style-name="T2">th</text:span><text:s/>run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table:style-name="ce2">
            <text:p>400 mesh</text:p>
          </table:table-cell>
          <table:table-cell office:value-type="string" table:style-name="ce2">
            <text:p>500 mesh</text:p>
          </table:table-cell>
          <table:table-cell office:value-type="string" table:style-name="ce2">
            <text:p>200 mesh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0" table:style-name="ce2">
            <text:p>0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7.54" table:style-name="ce2">
            <text:p>17,54</text:p>
          </table:table-cell>
          <table:table-cell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10.48" table:formula="of:=[.P7]+9+4+[.P7]-4.2" table:style-name="ce2">
            <text:p>10,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office:value-type="float" office:value="115" table:style-name="ce2">
            <text:p>115</text:p>
          </table:table-cell>
          <table:table-cell office:value-type="float" office:value="143.05000000000001" table:style-name="ce2">
            <text:p>143,05</text:p>
          </table:table-cell>
          <table:table-cell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31.28" table:formula="of:=[.G29]+4" table:style-name="ce2">
            <text:p>131,2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6.4000000000000001E-2" table:style-name="ce2">
            <text:p>0,064</text:p>
          </table:table-cell>
          <table:table-cell office:value-type="float" office:value="5.0999999999999997E-2" table:style-name="ce2">
            <text:p>0,051</text:p>
          </table:table-cell>
          <table:table-cell office:value-type="float" office:value="0.127" table:style-name="ce2">
            <text:p>0,127</text:p>
          </table:table-cell>
          <table:table-cell office:value-type="float" office:value="0.254" table:style-name="ce2">
            <text:p>0,254</text:p>
          </table:table-cell>
          <table:table-cell table:style-name="ce2"/>
          <table:table-cell office:value-type="string" table:style-name="ce2">
            <text:p>4mm spac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3E-2" table:style-name="ce2">
            <text:p>0,023</text:p>
          </table:table-cell>
          <table:table-cell office:value-type="float" office:value="2.3E-2" table:style-name="ce2">
            <text:p>0,023</text:p>
          </table:table-cell>
          <table:table-cell office:value-type="float" office:value="2.5999999999999999E-2" table:style-name="ce2">
            <text:p>0,026</text:p>
          </table:table-cell>
          <table:table-cell office:value-type="float" office:value="0.05" table:style-name="ce2">
            <text:p>0,05</text:p>
          </table:table-cell>
          <table:table-cell table:style-name="ce2"/>
          <table:table-cell office:value-type="string" table:style-name="ce2">
            <text:p>gap</text:p>
          </table:table-cell>
          <table:table-cell office:value-type="float" office:value="8.89" table:style-name="ce2">
            <text:p>8,89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4.1000000000000002E-2" table:formula="of:=[.B22]-[.B23]" table:style-name="ce2">
            <text:p>0,041</text:p>
          </table:table-cell>
          <table:table-cell office:value-type="float" office:value="2.7999999999999997E-2" table:formula="of:=[.C22]-[.C23]" table:style-name="ce2">
            <text:p>0,028</text:p>
          </table:table-cell>
          <table:table-cell office:value-type="float" office:value="0.10100000000000001" table:formula="of:=[.D22]-[.D23]" table:style-name="ce2">
            <text:p>0,101</text:p>
          </table:table-cell>
          <table:table-cell office:value-type="float" office:value="0.20400000000000001" table:formula="of:=[.E22]-[.E23]" table:style-name="ce2">
            <text:p>0,204</text:p>
          </table:table-cell>
          <table:table-cell table:style-name="ce2"/>
          <table:table-cell office:value-type="string" table:style-name="ce2">
            <text:p>Lens pl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,055</text:p>
          </table:table-cell>
          <table:table-cell office:value-type="float" office:value="5.5E-2" table:style-name="ce2">
            <text:p>0,055</text:p>
          </table:table-cell>
          <table:table-cell office:value-type="float" office:value="5.5E-2" table:style-name="ce2">
            <text:p>0,055</text:p>
          </table:table-cell>
          <table:table-cell office:value-type="float" office:value="5.5E-2" table:style-name="ce2">
            <text:p>0,055</text:p>
          </table:table-cell>
          <table:table-cell table:style-name="ce2"/>
          <table:table-cell office:value-type="string" table:style-name="ce2">
            <text:p>gap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detecto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56" table:style-name="ce3">
            <text:p>56</text:p>
          </table:table-cell>
          <table:table-cell office:value-type="float" office:value="38" table:style-name="ce3">
            <text:p>38</text:p>
          </table:table-cell>
          <table:table-cell office:value-type="float" office:value="35" table:style-name="ce3">
            <text:p>35</text:p>
          </table:table-cell>
          <table:table-cell office:value-type="float" office:value="63" table:style-name="ce3">
            <text:p>6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3.08" table:formula="of:=[.B27]*[.B25]" table:style-name="ce2">
            <text:p>3,08</text:p>
          </table:table-cell>
          <table:table-cell office:value-type="float" office:value="2.09" table:formula="of:=[.C27]*[.C25]" table:style-name="ce2">
            <text:p>2,09</text:p>
          </table:table-cell>
          <table:table-cell office:value-type="float" office:value="1.925" table:formula="of:=[.D27]*[.D25]" table:style-name="ce2">
            <text:p>1,925</text:p>
          </table:table-cell>
          <table:table-cell office:value-type="float" office:value="3.4649999999999999" table:formula="of:=[.E27]*[.E25]" table:style-name="ce2">
            <text:p>3,465</text:p>
          </table:table-cell>
          <table:table-cell table:style-name="ce2"/>
          <table:table-cell office:value-type="string" table:style-name="ce2">
            <text:p>Full stack length (top of plate)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float" office:value="127.28" table:style-name="ce2">
            <text:p>127,2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75.121951219512198" table:formula="of:=[.B28]/[.B24]" table:style-name="ce2">
            <text:p>75,12195122</text:p>
          </table:table-cell>
          <table:table-cell office:value-type="float" office:value="74.642857142857139" table:formula="of:=[.C28]/[.C24]" table:style-name="ce2">
            <text:p>74,64285714</text:p>
          </table:table-cell>
          <table:table-cell office:value-type="float" office:value="19.059405940594058" table:formula="of:=[.D28]/[.D24]" table:style-name="ce2">
            <text:p>19,05940594</text:p>
          </table:table-cell>
          <table:table-cell office:value-type="float" office:value="16.985294117647058" table:formula="of:=[.E28]/[.E24]" table:style-name="ce2">
            <text:p>16,98529412</text:p>
          </table:table-cell>
          <table:table-cell table:style-name="ce2"/>
          <table:table-cell office:value-type="string" table:style-name="ce2">
            <text:p>top of lens plate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1.4840408028956893" table:formula="of:=[.B21]/([.B30]-1)" table:style-name="ce2">
            <text:p>1,484040803</text:p>
          </table:table-cell>
          <table:table-cell office:value-type="float" office:value="1.4936954413191077" table:formula="of:=[.C21]/([.C30]-1)" table:style-name="ce2">
            <text:p>1,493695441</text:p>
          </table:table-cell>
          <table:table-cell office:value-type="float" office:value="6.3678728070175445" table:formula="of:=[.D21]/([.D30]-1)" table:style-name="ce2">
            <text:p>6,367872807</text:p>
          </table:table-cell>
          <table:table-cell office:value-type="float" office:value="8.9488500459981619" table:formula="of:=[.E21]/([.E30]-1)" table:style-name="ce2">
            <text:p>8,948850046</text:p>
          </table:table-cell>
          <table:table-cell table:style-name="ce2"/>
          <table:table-cell office:value-type="float" office:value="104.03" table:style-name="ce2">
            <text:p>104,0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8.5159591971043103" table:formula="of:=[.B20]-[.B31]" table:style-name="ce2">
            <text:p>8,515959197</text:p>
          </table:table-cell>
          <table:table-cell office:value-type="float" office:value="8.5063045586808919" table:formula="of:=[.C20]-[.C31]" table:style-name="ce2">
            <text:p>8,506304559</text:p>
          </table:table-cell>
          <table:table-cell office:value-type="float" office:value="8.6321271929824555" table:formula="of:=[.D20]-[.D31]" table:style-name="ce2">
            <text:p>8,632127193</text:p>
          </table:table-cell>
          <table:table-cell office:value-type="float" office:value="8.5911499540018372" table:formula="of:=[.E20]-[.E31]" table:style-name="ce2">
            <text:p>8,591149954</text:p>
          </table:table-cell>
          <table:table-cell table:number-columns-repeated="16379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Option 2: Point source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Working distance</text:p>
          </table:table-cell>
          <table:table-cell office:value-type="float" office:value="86" table:style-name="ce2">
            <text:p>86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15.480000000000004" table:formula="of:=[.J9]-[.B37]" table:style-name="ce2">
            <text:p>15,4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formula="of:=[.J4]" table:style-name="ce2">
            <text:p>43,1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,7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,25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,0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42]-[.B43]" table:style-name="ce2">
            <text:p>0,20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,055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office:value-type="string" table:style-name="ce2">
            <text:p>REMOVED FORMULA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89411297192116601" table:formula="of:=[.C131]*1000" table:style-name="ce1">
            <text:p>0,894112972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382906725103755" table:formula="of:=[.B48]/[.B44]" table:style-name="ce2">
            <text:p>4,38290672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24.765684308789339" table:formula="of:=[.B41]/([.B50]-1)" table:style-name="ce2">
            <text:p>24,76568431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18.374315691210661" table:formula="of:=[.B40]-[.B51]" table:style-name="ce2">
            <text:p>18,37431569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8.4017178044389365" table:formula="of:=[.B52]*[.B39]/([.B52]+[.B39])" table:style-name="ce2">
            <text:p>8,401717804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EXAMPLES WITH SIMULATED DATA</text:p>
          </table:table-cell>
          <table:table-cell table:number-columns-repeated="16383" table:style-name="ce2"/>
        </table:table-row>
        <table:table-row table:style-name="ro1">
          <table:table-cell table:style-name="ce2"/>
          <table:table-cell office:value-type="string" table:style-name="ce2">
            <text:p>200 mesh</text:p>
          </table:table-cell>
          <table:table-cell office:value-type="string" table:style-name="ce2">
            <text:p>300 mesh</text:p>
          </table:table-cell>
          <table:table-cell office:value-type="string" table:style-name="ce2">
            <text:p>500 mesh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90" table:style-name="ce2">
            <text:p>90</text:p>
          </table:table-cell>
          <table:table-cell office:value-type="float" office:value="140" table:style-name="ce2">
            <text:p>140</text:p>
          </table:table-cell>
          <table:table-cell office:value-type="float" office:value="145" table:style-name="ce2">
            <text:p>14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127" table:style-name="ce2">
            <text:p>0,127</text:p>
          </table:table-cell>
          <table:table-cell office:value-type="float" office:value="8.5000000000000006E-2" table:style-name="ce2">
            <text:p>0,085</text:p>
          </table:table-cell>
          <table:table-cell office:value-type="float" office:value="5.0999999999999997E-2" table:style-name="ce2">
            <text:p>0,051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5999999999999999E-2" table:style-name="ce2">
            <text:p>0,026</text:p>
          </table:table-cell>
          <table:table-cell office:value-type="float" office:value="2.5000000000000001E-2" table:style-name="ce2">
            <text:p>0,025</text:p>
          </table:table-cell>
          <table:table-cell office:value-type="float" office:value="2.3E-2" table:style-name="ce2">
            <text:p>0,023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10100000000000001" table:formula="of:=[.B60]-[.B61]" table:style-name="ce2">
            <text:p>0,101</text:p>
          </table:table-cell>
          <table:table-cell office:value-type="float" office:value="6.0000000000000005E-2" table:formula="of:=[.C60]-[.C61]" table:style-name="ce2">
            <text:p>0,06</text:p>
          </table:table-cell>
          <table:table-cell office:value-type="float" office:value="2.7999999999999997E-2" table:formula="of:=[.D60]-[.D61]" table:style-name="ce2">
            <text:p>0,02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,055</text:p>
          </table:table-cell>
          <table:table-cell office:value-type="float" office:value="5.5E-2" table:style-name="ce2">
            <text:p>0,055</text:p>
          </table:table-cell>
          <table:table-cell office:value-type="float" office:value="5.5E-2" table:style-name="ce2">
            <text:p>0,05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34" table:style-name="ce3">
            <text:p>34</text:p>
          </table:table-cell>
          <table:table-cell office:value-type="float" office:value="31" table:style-name="ce3">
            <text:p>31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1.87" table:formula="of:=[.B65]*[.B63]" table:style-name="ce2">
            <text:p>1,87</text:p>
          </table:table-cell>
          <table:table-cell office:value-type="float" office:value="1.7050000000000001" table:formula="of:=[.C65]*[.C63]" table:style-name="ce2">
            <text:p>1,705</text:p>
          </table:table-cell>
          <table:table-cell office:value-type="float" office:value="5.5" table:formula="of:=[.D65]*[.D63]" table:style-name="ce2">
            <text:p>5,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18.514851485148515" table:formula="of:=[.B66]/[.B62]" table:style-name="ce2">
            <text:p>18,51485149</text:p>
          </table:table-cell>
          <table:table-cell office:value-type="float" office:value="28.416666666666664" table:formula="of:=[.C66]/[.C62]" table:style-name="ce2">
            <text:p>28,41666667</text:p>
          </table:table-cell>
          <table:table-cell office:value-type="float" office:value="196.42857142857144" table:formula="of:=[.D66]/[.D62]" table:style-name="ce2">
            <text:p>196,428571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5.1384963256076874" table:formula="of:=[.B59]/([.B68]-1)" table:style-name="ce2">
            <text:p>5,138496326</text:p>
          </table:table-cell>
          <table:table-cell office:value-type="float" office:value="5.1063829787234045" table:formula="of:=[.C59]/([.C68]-1)" table:style-name="ce2">
            <text:p>5,106382979</text:p>
          </table:table-cell>
          <table:table-cell office:value-type="float" office:value="0.74195906432748537" table:formula="of:=[.D59]/([.D68]-1)" table:style-name="ce2">
            <text:p>0,74195906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14.861503674392313" table:formula="of:=[.B58]-[.B69]" table:style-name="ce2">
            <text:p>14,86150367</text:p>
          </table:table-cell>
          <table:table-cell office:value-type="float" office:value="14.893617021276595" table:formula="of:=[.C58]-[.C69]" table:style-name="ce2">
            <text:p>14,89361702</text:p>
          </table:table-cell>
          <table:table-cell office:value-type="float" office:value="19.258040935672515" table:formula="of:=[.D58]-[.D69]" table:style-name="ce2">
            <text:p>19,2580409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8.5260256202367444" table:formula="of:=[.B70]*[.B57]/([.B70]+[.B57])" table:style-name="ce2">
            <text:p>8,52602562</text:p>
          </table:table-cell>
          <table:table-cell office:value-type="float" office:value="8.5365853658536572" table:formula="of:=[.C70]*[.C57]/([.C70]+[.C57])" table:style-name="ce2">
            <text:p>8,536585366</text:p>
          </table:table-cell>
          <table:table-cell office:value-type="float" office:value="8.4321988690920744" table:formula="of:=[.D70]*[.D57]/([.D70]+[.D57])" table:style-name="ce2">
            <text:p>8,432198869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COND TRY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Option 1: Point source virtual image</text:p>
          </table:table-cell>
          <table:table-cell table:number-columns-repeated="16383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or propaga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olepiece to lens (mm)</text:p>
          </table:table-cell>
          <table:table-cell office:value-type="float" office:value="101.48" table:style-name="ce1">
            <text:p>101,48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126.92" table:formula="of:=[.B78]+[.B79]" table:style-name="ce1">
            <text:p>126,92</text:p>
          </table:table-cell>
          <table:table-cell table:number-columns-repeated="3" table:style-name="ce1"/>
          <table:table-cell office:value-type="string" table:style-name="ce1">
            <text:p>Polepiece to lens (mm)</text:p>
          </table:table-cell>
          <table:table-cell office:value-type="float" office:value="0.17320508075688773" table:formula="of:=SQRT(3)*[.J78]" table:style-name="ce1">
            <text:p>0,173205081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0.1" table:style-name="ce1">
            <text:p>0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ns to mesh (mm)</text:p>
          </table:table-cell>
          <table:table-cell office:value-type="float" office:value="43.14" table:style-name="ce1">
            <text:p>43,14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.20399999999999999" table:style-name="ce1">
            <text:p>0,204</text:p>
          </table:table-cell>
          <table:table-cell table:number-columns-repeated="3" table:style-name="ce1"/>
          <table:table-cell office:value-type="string" table:style-name="ce1">
            <text:p>Lens to mesh (mm)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sh to detector (mm)</text:p>
          </table:table-cell>
          <table:table-cell office:value-type="float" office:value="83.78" table:style-name="ce1">
            <text:p>83,78</text:p>
          </table:table-cell>
          <table:table-cell table:number-columns-repeated="6" table:style-name="ce1"/>
          <table:table-cell office:value-type="string" table:style-name="ce1">
            <text:p>Mesh to detector (mm)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string" table:style-name="ce1">
            <text:p>Working distance (mm)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Measured pixel gap distance</text:p>
          </table:table-cell>
          <table:table-cell office:value-type="string" table:style-name="ce1">
            <text:p>Magnification</text:p>
          </table:table-cell>
          <table:table-cell office:value-type="string" table:style-name="ce1">
            <text:p>Object point position (mm)</text:p>
          </table:table-cell>
          <table:table-cell office:value-type="string" table:style-name="ce1">
            <text:p>Image point position (mm)</text:p>
          </table:table-cell>
          <table:table-cell office:value-type="string" table:style-name="ce1">
            <text:p>Focal length (mm)</text:p>
          </table:table-cell>
          <table:table-cell office:value-type="string" table:style-name="ce1">
            <text:p>s_f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s_M</text:p>
          </table:table-cell>
          <table:table-cell office:value-type="string" table:style-name="ce1">
            <text:p>s_z'</text:p>
          </table:table-cell>
          <table:table-cell office:value-type="string" table:style-name="ce1">
            <text:p>s_z</text:p>
          </table:table-cell>
          <table:table-cell table:number-columns-repeated="16372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36157297483901402" table:style-name="ce1">
            <text:p>0,361572975</text:p>
          </table:table-cell>
          <table:table-cell office:value-type="float" office:value="6.5740540879820726" table:formula="of:=[.B82]/0.055" table:style-name="ce1">
            <text:p>6,574054088</text:p>
          </table:table-cell>
          <table:table-cell office:value-type="float" office:value="1.7724165433285002" table:formula="of:=[.B82]/[.$E$78]" table:style-name="ce1">
            <text:p>1,772416543</text:p>
          </table:table-cell>
          <table:table-cell office:value-type="float" office:value="17.480000000000004" table:formula="of:=[.$B$77]-[.A82]" table:style-name="ce1">
            <text:p>17,48</text:p>
          </table:table-cell>
          <table:table-cell office:value-type="float" office:value="-65.324792376112143" table:formula="of:=[.$B$78]-([.$B$79])/([.D82]-1)" table:style-name="ce1">
            <text:p>-65,32479238</text:p>
          </table:table-cell>
          <table:table-cell office:value-type="float" office:value="23.866283330441519" table:formula="of:=[.E82]*[.F82]/([.E82]+[.F82])" table:style-name="ce1">
            <text:p>23,86628333</text:p>
          </table:table-cell>
          <table:table-cell office:value-type="float" office:value="2.0269244047382124" table:formula="of:=SQRT(([.L82]^2*[.F82]^4+[.K82]^2*[.E82]^4)/([.E82]+[.F82])^4)" table:style-name="ce1">
            <text:p>2,026924405</text:p>
          </table:table-cell>
          <table:table-cell office:value-type="float" office:value="7.3740193467988803E-3" table:style-name="ce1">
            <text:p>0,007374019</text:p>
          </table:table-cell>
          <table:table-cell office:value-type="float" office:value="3.6147153660778829E-2" table:formula="of:=[.I82]/[.$E$78]" table:style-name="ce1">
            <text:p>0,036147154</text:p>
          </table:table-cell>
          <table:table-cell office:value-type="float" office:value="5.0785151825643879" table:formula="of:=SQRT([.$J$78]^2+([.$J$79]/([.D82]-1))^2+([.J82]*[.$B$79]/([.D82]-1)^2)^2)" table:style-name="ce1">
            <text:p>5,078515183</text:p>
          </table:table-cell>
          <table:table-cell office:value-type="float" office:value="1.0246950765959599" table:formula="of:=SQRT(0.05+[.$M$79])" table:style-name="ce1">
            <text:p>1,024695077</text:p>
          </table:table-cell>
          <table:table-cell table:number-columns-repeated="16372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40213118843787499" table:style-name="ce1">
            <text:p>0,402131188</text:p>
          </table:table-cell>
          <table:table-cell office:value-type="float" office:value="7.3114761534159092" table:formula="of:=[.B83]/0.055" table:style-name="ce1">
            <text:p>7,311476153</text:p>
          </table:table-cell>
          <table:table-cell office:value-type="float" office:value="1.9712313158719363" table:formula="of:=[.B83]/[.$E$78]" table:style-name="ce1">
            <text:p>1,971231316</text:p>
          </table:table-cell>
          <table:table-cell office:value-type="float" office:value="15.480000000000004" table:formula="of:=[.$B$77]-[.A83]" table:style-name="ce1">
            <text:p>15,48</text:p>
          </table:table-cell>
          <table:table-cell office:value-type="float" office:value="-43.121633692057543" table:formula="of:=[.$B$78]-([.$B$79])/([.D83]-1)" table:style-name="ce1">
            <text:p>-43,12163369</text:p>
          </table:table-cell>
          <table:table-cell office:value-type="float" office:value="24.149183691152629" table:formula="of:=[.E83]*[.F83]/([.E83]+[.F83])" table:style-name="ce1">
            <text:p>24,14918369</text:p>
          </table:table-cell>
          <table:table-cell office:value-type="float" office:value="2.6453052773793906" table:formula="of:=SQRT(([.L83]^2*[.F83]^4+[.K83]^2*[.E83]^4)/([.E83]+[.F83])^4)" table:style-name="ce1">
            <text:p>2,645305277</text:p>
          </table:table-cell>
          <table:table-cell office:value-type="float" office:value="6.4542271177711096E-3" table:style-name="ce1">
            <text:p>0,006454227</text:p>
          </table:table-cell>
          <table:table-cell office:value-type="float" office:value="3.1638368224368184E-2" table:formula="of:=[.I83]/[.$E$78]" table:style-name="ce1">
            <text:p>0,031638368</text:p>
          </table:table-cell>
          <table:table-cell office:value-type="float" office:value="2.813681127387015" table:formula="of:=SQRT([.$J$78]^2+([.$J$79]/([.D83]-1))^2+([.J83]*[.$B$79]/([.D83]-1)^2)^2)" table:style-name="ce1">
            <text:p>2,813681127</text:p>
          </table:table-cell>
          <table:table-cell office:value-type="float" office:value="1.0246950765959599" table:formula="of:=SQRT(0.05+[.$M$79])" table:style-name="ce1">
            <text:p>1,024695077</text:p>
          </table:table-cell>
          <table:table-cell table:number-columns-repeated="1637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45978296018084902" table:style-name="ce1">
            <text:p>0,45978296</text:p>
          </table:table-cell>
          <table:table-cell office:value-type="float" office:value="8.359690185106345" table:formula="of:=[.B84]/0.055" table:style-name="ce1">
            <text:p>8,359690185</text:p>
          </table:table-cell>
          <table:table-cell office:value-type="float" office:value="2.2538380401022011" table:formula="of:=[.B84]/[.$E$78]" table:style-name="ce1">
            <text:p>2,25383804</text:p>
          </table:table-cell>
          <table:table-cell office:value-type="float" office:value="13.480000000000004" table:formula="of:=[.$B$77]-[.A84]" table:style-name="ce1">
            <text:p>13,48</text:p>
          </table:table-cell>
          <table:table-cell office:value-type="float" office:value="-23.678837298293359" table:formula="of:=[.$B$78]-([.$B$79])/([.D84]-1)" table:style-name="ce1">
            <text:p>-23,6788373</text:p>
          </table:table-cell>
          <table:table-cell office:value-type="float" office:value="31.296776038814446" table:formula="of:=[.E84]*[.F84]/([.E84]+[.F84])" table:style-name="ce1">
            <text:p>31,29677604</text:p>
          </table:table-cell>
          <table:table-cell office:value-type="float" office:value="8.1786783668887502" table:formula="of:=SQRT(([.L84]^2*[.F84]^4+[.K84]^2*[.E84]^4)/([.E84]+[.F84])^4)" table:style-name="ce1">
            <text:p>8,178678367</text:p>
          </table:table-cell>
          <table:table-cell office:value-type="float" office:value="1.32080262050626E-2" table:style-name="ce1">
            <text:p>0,013208026</text:p>
          </table:table-cell>
          <table:table-cell office:value-type="float" office:value="6.4745226495404901E-2" table:formula="of:=[.I84]/[.$E$78]" table:style-name="ce1">
            <text:p>0,064745226</text:p>
          </table:table-cell>
          <table:table-cell office:value-type="float" office:value="3.452736564052568" table:formula="of:=SQRT([.$J$78]^2+([.$J$79]/([.D84]-1))^2+([.J84]*[.$B$79]/([.D84]-1)^2)^2)" table:style-name="ce1">
            <text:p>3,452736564</text:p>
          </table:table-cell>
          <table:table-cell office:value-type="float" office:value="1.0246950765959599" table:formula="of:=SQRT(0.05+[.$M$79])" table:style-name="ce1">
            <text:p>1,024695077</text:p>
          </table:table-cell>
          <table:table-cell table:number-columns-repeated="1637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48805777271755402" table:style-name="ce1">
            <text:p>0,488057773</text:p>
          </table:table-cell>
          <table:table-cell office:value-type="float" office:value="8.8737776857737085" table:formula="of:=[.B85]/0.055" table:style-name="ce1">
            <text:p>8,873777686</text:p>
          </table:table-cell>
          <table:table-cell office:value-type="float" office:value="2.3924400623409512" table:formula="of:=[.B85]/[.$E$78]" table:style-name="ce1">
            <text:p>2,392440062</text:p>
          </table:table-cell>
          <table:table-cell office:value-type="float" office:value="11.480000000000004" table:formula="of:=[.$B$77]-[.A85]" table:style-name="ce1">
            <text:p>11,48</text:p>
          </table:table-cell>
          <table:table-cell office:value-type="float" office:value="-17.027760369627842" table:formula="of:=[.$B$78]-([.$B$79])/([.D85]-1)" table:style-name="ce1">
            <text:p>-17,02776037</text:p>
          </table:table-cell>
          <table:table-cell office:value-type="float" office:value="35.235604283398608" table:formula="of:=[.E85]*[.F85]/([.E85]+[.F85])" table:style-name="ce1">
            <text:p>35,23560428</text:p>
          </table:table-cell>
          <table:table-cell office:value-type="float" office:value="10.277559064323057" table:formula="of:=SQRT(([.L85]^2*[.F85]^4+[.K85]^2*[.E85]^4)/([.E85]+[.F85])^4)" table:style-name="ce1">
            <text:p>10,27755906</text:p>
          </table:table-cell>
          <table:table-cell office:value-type="float" office:value="3.8454369348915E-3" table:style-name="ce1">
            <text:p>0,003845437</text:p>
          </table:table-cell>
          <table:table-cell office:value-type="float" office:value="1.8850181053389706E-2" table:formula="of:=[.I85]/[.$E$78]" table:style-name="ce1">
            <text:p>0,018850181</text:p>
          </table:table-cell>
          <table:table-cell office:value-type="float" office:value="0.82377412655009752" table:formula="of:=SQRT([.$J$78]^2+([.$J$79]/([.D85]-1))^2+([.J85]*[.$B$79]/([.D85]-1)^2)^2)" table:style-name="ce1">
            <text:p>0,823774127</text:p>
          </table:table-cell>
          <table:table-cell office:value-type="float" office:value="1.0246950765959599" table:formula="of:=SQRT(0.05+[.$M$79])" table:style-name="ce1">
            <text:p>1,024695077</text:p>
          </table:table-cell>
          <table:table-cell table:number-columns-repeated="16372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51709116692169599" table:style-name="ce1">
            <text:p>0,517091167</text:p>
          </table:table-cell>
          <table:table-cell office:value-type="float" office:value="9.4016575803944722" table:formula="of:=[.B86]/0.055" table:style-name="ce1">
            <text:p>9,40165758</text:p>
          </table:table-cell>
          <table:table-cell office:value-type="float" office:value="2.5347606221651766" table:formula="of:=[.B86]/[.$E$78]" table:style-name="ce1">
            <text:p>2,534760622</text:p>
          </table:table-cell>
          <table:table-cell office:value-type="float" office:value="9.480000000000004" table:formula="of:=[.$B$77]-[.A86]" table:style-name="ce1">
            <text:p>9,48</text:p>
          </table:table-cell>
          <table:table-cell office:value-type="float" office:value="-11.448317415784786" table:formula="of:=[.$B$78]-([.$B$79])/([.D86]-1)" table:style-name="ce1">
            <text:p>-11,44831742</text:p>
          </table:table-cell>
          <table:table-cell office:value-type="float" office:value="55.138489468868592" table:formula="of:=[.E86]*[.F86]/([.E86]+[.F86])" table:style-name="ce1">
            <text:p>55,13848947</text:p>
          </table:table-cell>
          <table:table-cell office:value-type="float" office:value="35.845059185556508" table:formula="of:=SQRT(([.L86]^2*[.F86]^4+[.K86]^2*[.E86]^4)/([.E86]+[.F86])^4)" table:style-name="ce1">
            <text:p>35,84505919</text:p>
          </table:table-cell>
          <table:table-cell office:value-type="float" office:value="2.1492706006442002E-3" table:style-name="ce1">
            <text:p>0,002149271</text:p>
          </table:table-cell>
          <table:table-cell office:value-type="float" office:value="1.0535640199236276E-2" table:formula="of:=[.I86]/[.$E$78]" table:style-name="ce1">
            <text:p>0,01053564</text:p>
          </table:table-cell>
          <table:table-cell office:value-type="float" office:value="0.39327975012498062" table:formula="of:=SQRT([.$J$78]^2+([.$J$79]/([.D86]-1))^2+([.J86]*[.$B$79]/([.D86]-1)^2)^2)" table:style-name="ce1">
            <text:p>0,39327975</text:p>
          </table:table-cell>
          <table:table-cell office:value-type="float" office:value="1.0246950765959599" table:formula="of:=SQRT(0.05+[.$M$79])" table:style-name="ce1">
            <text:p>1,024695077</text:p>
          </table:table-cell>
          <table:table-cell table:number-columns-repeated="16372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55787813901751304" table:style-name="ce1">
            <text:p>0,557878139</text:p>
          </table:table-cell>
          <table:table-cell office:value-type="float" office:value="10.14323889122751" table:formula="of:=[.B87]/0.055" table:style-name="ce1">
            <text:p>10,14323889</text:p>
          </table:table-cell>
          <table:table-cell office:value-type="float" office:value="2.7346967598897698" table:formula="of:=[.B87]/[.$E$78]" table:style-name="ce1">
            <text:p>2,73469676</text:p>
          </table:table-cell>
          <table:table-cell office:value-type="float" office:value="6.480000000000004" table:formula="of:=[.$B$77]-[.A87]" table:style-name="ce1">
            <text:p>6,48</text:p>
          </table:table-cell>
          <table:table-cell office:value-type="float" office:value="-5.1566256334759899" table:formula="of:=[.$B$78]-([.$B$79])/([.D87]-1)" table:style-name="ce1">
            <text:p>-5,156625633</text:p>
          </table:table-cell>
          <table:table-cell office:value-type="float" office:value="-25.24979699636496" table:formula="of:=[.E87]*[.F87]/([.E87]+[.F87])" table:style-name="ce1">
            <text:p>-25,249797</text:p>
          </table:table-cell>
          <table:table-cell office:value-type="float" office:value="23.37235039554513" table:formula="of:=SQRT(([.L87]^2*[.F87]^4+[.K87]^2*[.E87]^4)/([.E87]+[.F87])^4)" table:style-name="ce1">
            <text:p>23,3723504</text:p>
          </table:table-cell>
          <table:table-cell office:value-type="float" office:value="5.2626020383051298E-3" table:style-name="ce1">
            <text:p>0,005262602</text:p>
          </table:table-cell>
          <table:table-cell office:value-type="float" office:value="2.5797068815221227E-2" table:formula="of:=[.I87]/[.$E$78]" table:style-name="ce1">
            <text:p>0,025797069</text:p>
          </table:table-cell>
          <table:table-cell office:value-type="float" office:value="0.72744594683888064" table:formula="of:=SQRT([.$J$78]^2+([.$J$79]/([.D87]-1))^2+([.J87]*[.$B$79]/([.D87]-1)^2)^2)" table:style-name="ce1">
            <text:p>0,727445947</text:p>
          </table:table-cell>
          <table:table-cell office:value-type="float" office:value="1.0246950765959599" table:formula="of:=SQRT(0.05+[.$M$79])" table:style-name="ce1">
            <text:p>1,024695077</text:p>
          </table:table-cell>
          <table:table-cell table:number-columns-repeated="1637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eighted average</text:p>
          </table:table-cell>
          <table:table-cell office:value-type="float" office:value="24.555187341306098" table:formula="of:=SUM([.G82:.G86]/[.H82:.H86]^2)/SUM(1/[.H82:.H86]^2)" table:number-matrix-columns-spanned="1" table:number-matrix-rows-spanned="1" table:style-name="ce1">
            <text:p>24,555187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float" office:value="1.558883018311167" table:formula="of:=SQRT(1/SUM(1/[.H82:.H86]^2))" table:number-matrix-columns-spanned="1" table:number-matrix-rows-spanned="1" table:style-name="ce1">
            <text:p>1,558883018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Option 2: Parallel beam</text:p>
          </table:table-cell>
          <table:table-cell table:number-columns-repeated="16383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or propaga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olepiece to lens (mm)</text:p>
          </table:table-cell>
          <table:table-cell office:value-type="float" office:value="101.48" table:style-name="ce1">
            <text:p>101,48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126.92" table:formula="of:=[.B95]+[.B96]" table:style-name="ce1">
            <text:p>126,92</text:p>
          </table:table-cell>
          <table:table-cell table:number-columns-repeated="3" table:style-name="ce1"/>
          <table:table-cell office:value-type="string" table:style-name="ce1">
            <text:p>Polepiece to lens (mm)</text:p>
          </table:table-cell>
          <table:table-cell office:value-type="float" office:value="0.17320508075688773" table:formula="of:=SQRT(3)*[.J95]" table:style-name="ce1">
            <text:p>0,173205081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0.14142135623730953" table:formula="of:=SQRT(2)*[.J95]" table:style-name="ce1">
            <text:p>0,1414213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ns to mesh (mm)</text:p>
          </table:table-cell>
          <table:table-cell office:value-type="float" office:value="43.14" table:style-name="ce1">
            <text:p>43,14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.20399999999999999" table:style-name="ce1">
            <text:p>0,204</text:p>
          </table:table-cell>
          <table:table-cell table:number-columns-repeated="3" table:style-name="ce1"/>
          <table:table-cell office:value-type="string" table:style-name="ce1">
            <text:p>Lens to mesh (mm)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sh to detector (mm)</text:p>
          </table:table-cell>
          <table:table-cell office:value-type="float" office:value="83.78" table:style-name="ce1">
            <text:p>83,78</text:p>
          </table:table-cell>
          <table:table-cell table:number-columns-repeated="6" table:style-name="ce1"/>
          <table:table-cell office:value-type="string" table:style-name="ce1">
            <text:p>Mesh to detector (mm)</text:p>
          </table:table-cell>
          <table:table-cell office:value-type="float" office:value="0.1" table:style-name="ce1">
            <text:p>0,1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Run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Measured pixel gap distance</text:p>
          </table:table-cell>
          <table:table-cell office:value-type="string" table:style-name="ce1">
            <text:p>Magnification</text:p>
          </table:table-cell>
          <table:table-cell table:style-name="ce1"/>
          <table:table-cell office:value-type="string" table:style-name="ce1">
            <text:p>Focal length (mm)</text:p>
          </table:table-cell>
          <table:table-cell office:value-type="string" table:style-name="ce1">
            <text:p>s_f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s_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solution</text:p>
          </table:table-cell>
          <table:table-cell office:value-type="float" office:value="270" table:style-name="ce1">
            <text:p>270</text:p>
          </table:table-cell>
          <table:table-cell office:value-type="float" office:value="0.84461202976911798" table:style-name="ce1">
            <text:p>0,84461203</text:p>
          </table:table-cell>
          <table:table-cell office:value-type="float" office:value="14.852118073858582" table:formula="of:=[.C100]/0.055" table:style-name="ce1">
            <text:p>14,85211807</text:p>
          </table:table-cell>
          <table:table-cell office:value-type="float" office:value="4.0042475199128535" table:formula="of:=[.C100]/[.$E$78]" table:style-name="ce1">
            <text:p>4,00424752</text:p>
          </table:table-cell>
          <table:table-cell table:style-name="ce1"/>
          <table:table-cell office:value-type="float" office:value="15.252817121529898" table:formula="of:=[.$B$95]-([.$B$96])/([.E99]-1)" table:style-name="ce1">
            <text:p>15,25281712</text:p>
          </table:table-cell>
          <table:table-cell office:value-type="float" office:value="0.47517172524104945" table:formula="of:=SQRT([.$J$95]^2+([.$J$96]/([.E99]-1))^2+([.J99]*[.$B$96]/([.E99]-1)^2)^2)" table:style-name="ce1">
            <text:p>0,475171725</text:p>
          </table:table-cell>
          <table:table-cell office:value-type="float" office:value="1.01825658334725E-2" table:style-name="ce1">
            <text:p>0,010182566</text:p>
          </table:table-cell>
          <table:table-cell office:value-type="float" office:value="4.9914538399375007E-2" table:formula="of:=[.I99]/[.$E$78]" table:style-name="ce1">
            <text:p>0,0499145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verview 1</text:p>
          </table:table-cell>
          <table:table-cell office:value-type="float" office:value="270" table:style-name="ce1">
            <text:p>270</text:p>
          </table:table-cell>
          <table:table-cell office:value-type="float" office:value="0.816866494062222" table:style-name="ce1">
            <text:p>0,816866494</text:p>
          </table:table-cell>
          <table:table-cell office:value-type="float" office:value="15.708906837093563" table:formula="of:=[.C101]/0.055" table:style-name="ce1">
            <text:p>15,70890684</text:p>
          </table:table-cell>
          <table:table-cell office:value-type="float" office:value="4.2352444903928728" table:formula="of:=[.C101]/[.$E$78]" table:style-name="ce1">
            <text:p>4,23524449</text:p>
          </table:table-cell>
          <table:table-cell table:style-name="ce1"/>
          <table:table-cell office:value-type="float" office:value="17.243966408478094" table:formula="of:=[.$B$95]-([.$B$96])/([.E100]-1)" table:style-name="ce1">
            <text:p>17,24396641</text:p>
          </table:table-cell>
          <table:table-cell office:value-type="float" office:value="2.4454664808000843" table:formula="of:=SQRT([.$J$95]^2+([.$J$96]/([.E100]-1))^2+([.J100]*[.$B$96]/([.E100]-1)^2)^2)" table:style-name="ce1">
            <text:p>2,445466481</text:p>
          </table:table-cell>
          <table:table-cell office:value-type="float" office:value="6.2268381672499998E-2" table:style-name="ce1">
            <text:p>0,062268382</text:p>
          </table:table-cell>
          <table:table-cell office:value-type="float" office:value="0.30523716506127452" table:formula="of:=[.I100]/[.$E$78]" table:style-name="ce1">
            <text:p>0,3052371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verview 2</text:p>
          </table:table-cell>
          <table:table-cell office:value-type="float" office:value="270" table:style-name="ce1">
            <text:p>270</text:p>
          </table:table-cell>
          <table:table-cell office:value-type="float" office:value="0.86398987604014599" table:style-name="ce1">
            <text:p>0,863989876</text:p>
          </table:table-cell>
          <table:table-cell office:value-type="float" office:value="15.356582359438509" table:formula="of:=[.C99]/0.055" table:style-name="ce1">
            <text:p>15,35658236</text:p>
          </table:table-cell>
          <table:table-cell office:value-type="float" office:value="4.1402550478878331" table:formula="of:=[.C99]/[.$E$78]" table:style-name="ce1">
            <text:p>4,140255048</text:p>
          </table:table-cell>
          <table:table-cell table:style-name="ce1"/>
          <table:table-cell office:value-type="float" office:value="16.46063838051904" table:formula="of:=[.$B$95]-([.$B$96])/([.E101]-1)" table:style-name="ce1">
            <text:p>16,46063838</text:p>
          </table:table-cell>
          <table:table-cell office:value-type="float" office:value="0.37410325422522511" table:formula="of:=SQRT([.$J$95]^2+([.$J$96]/([.E101]-1))^2+([.J101]*[.$B$96]/([.E101]-1)^2)^2)" table:style-name="ce1">
            <text:p>0,374103254</text:p>
          </table:table-cell>
          <table:table-cell office:value-type="float" office:value="8.62208084550997E-3" table:style-name="ce1">
            <text:p>0,008622081</text:p>
          </table:table-cell>
          <table:table-cell office:value-type="float" office:value="4.2265102183872402E-2" table:formula="of:=[.I101]/[.$E$78]" table:style-name="ce1">
            <text:p>0,042265102</text:p>
          </table:table-cell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eighted average</text:p>
          </table:table-cell>
          <table:table-cell office:value-type="float" office:value="16.016195966869184" table:formula="of:=SUM([.G99:.G101]/[.H99:.H101]^2)/SUM(1/[.H99:.H101]^2)" table:number-matrix-columns-spanned="1" table:number-matrix-rows-spanned="1" table:style-name="ce1">
            <text:p>16,016195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float" office:value="0.2918369396688027" table:formula="of:=SQRT(1/SUM(1/[.H99:.H101]^2))" table:number-matrix-columns-spanned="1" table:number-matrix-rows-spanned="1" table:style-name="ce1">
            <text:p>0,2918369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nd +- another mm if we take into account that the beam is focussed at 270</text:p>
          </table:table-cell>
          <table:table-cell table:number-columns-repeated="16382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office:value-type="string" table:style-name="ce1">
            <text:p>Resolution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Focal length(mm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.2701603043439102E-4" table:style-name="ce1">
            <text:p>0,000427016</text:p>
          </table:table-cell>
          <table:table-cell office:value-type="float" office:value="9.5161558663267593E-6" table:style-name="ce4">
            <text:p>9,52E-0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1031643688332197E-4" table:style-name="ce1">
            <text:p>0,000510316</text:p>
          </table:table-cell>
          <table:table-cell office:value-type="float" office:value="2.0476979474055301E-5" table:style-name="ce4">
            <text:p>2,05E-0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9354032641543005E-4" table:style-name="ce1">
            <text:p>0,00049354</text:p>
          </table:table-cell>
          <table:table-cell office:value-type="float" office:value="1.42915207469048E-5" table:style-name="ce4">
            <text:p>1,43E-0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5.2398795150005795E-4" table:style-name="ce1">
            <text:p>0,000523988</text:p>
          </table:table-cell>
          <table:table-cell office:value-type="float" office:value="6.3284483070371698E-6" table:style-name="ce4">
            <text:p>6,33E-0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5.4265300028312697E-4" table:style-name="ce1">
            <text:p>0,000542653</text:p>
          </table:table-cell>
          <table:table-cell office:value-type="float" office:value="5.2606940138437097E-6" table:style-name="ce4">
            <text:p>5,26E-0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8.7129160818605995E-4" table:style-name="ce1">
            <text:p>0,000871292</text:p>
          </table:table-cell>
          <table:table-cell office:value-type="float" office:value="1.32418724502264E-5" table:style-name="ce4">
            <text:p>1,32E-05</text:p>
          </table:table-cell>
          <table:table-cell office:value-type="float" office:value="17.527329631703498" table:style-name="ce1">
            <text:p>17,52732963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Overview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calculated focal length (mm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70 (parallel)</text:p>
          </table:table-cell>
          <table:table-cell office:value-type="float" office:value="8.6319185188676699E-4" table:style-name="ce1">
            <text:p>0,000863192</text:p>
          </table:table-cell>
          <table:table-cell office:value-type="float" office:value="1.00227825556606E-5" table:style-name="ce4">
            <text:p>1,00E-05</text:p>
          </table:table-cell>
          <table:table-cell office:value-type="float" office:value="17.212616414961602" table:style-name="ce1">
            <text:p>17,21261641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.7300824113510595E-4" table:style-name="ce1">
            <text:p>0,000973008</text:p>
          </table:table-cell>
          <table:table-cell office:value-type="float" office:value="1.9106340405498199E-5" table:style-name="ce4">
            <text:p>1,91E-05</text:p>
          </table:table-cell>
          <table:table-cell office:value-type="float" office:value="17.0231125561589" table:style-name="ce1">
            <text:p>17,02311256</text:p>
          </table:table-cell>
          <table:table-cell table:style-name="ce5"/>
          <table:table-cell office:value-type="string" table:style-name="ce6">
            <text:p>Stray electron images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.7855244024918492E-4" table:style-name="ce1">
            <text:p>0,000978552</text:p>
          </table:table-cell>
          <table:table-cell office:value-type="float" office:value="3.6179419094112699E-5" table:style-name="ce4">
            <text:p>3,62E-05</text:p>
          </table:table-cell>
          <table:table-cell office:value-type="float" office:value="13.9744060170369" table:style-name="ce1">
            <text:p>13,9744060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9.7020097007636901E-4" table:style-name="ce1">
            <text:p>0,000970201</text:p>
          </table:table-cell>
          <table:table-cell office:value-type="float" office:value="2.3085314932016799E-5" table:style-name="ce4">
            <text:p>2,31E-05</text:p>
          </table:table-cell>
          <table:table-cell office:value-type="float" office:value="13.260582260821399" table:style-name="ce1">
            <text:p>13,26058226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9.1274591740251405E-4" table:style-name="ce1">
            <text:p>0,000912746</text:p>
          </table:table-cell>
          <table:table-cell office:value-type="float" office:value="1.9592918530021701E-5" table:style-name="ce4">
            <text:p>1,96E-05</text:p>
          </table:table-cell>
          <table:table-cell office:value-type="float" office:value="11.858528217553999" table:style-name="ce1">
            <text:p>11,85852822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8.9411297192116602E-4" table:style-name="ce1">
            <text:p>0,000894113</text:p>
          </table:table-cell>
          <table:table-cell office:value-type="float" office:value="1.81234036675559E-5" table:style-name="ce4">
            <text:p>1,81E-05</text:p>
          </table:table-cell>
          <table:table-cell office:value-type="float" office:value="10.8473816176979" table:style-name="ce1">
            <text:p>10,84738162</text:p>
          </table:table-cell>
          <table:table-cell table:style-name="ce5"/>
          <table:table-cell table:number-columns-repeated="16378"/>
        </table:table-row>
        <table:table-row table:number-rows-repeated="10484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Des De Borger</meta:initial-creator>
    <dc:creator>Des De Borger</dc:creator>
    <meta:creation-date>2026-03-31T08:36:37Z</meta:creation-date>
    <dc:date>2026-05-02T12:30:13Z</dc:date>
    <meta:editing-cycles>4</meta:editing-cycles>
    <meta:editing-duration>PT18424S</meta:editing-duration>
    <meta:user-defined meta:name="AppVersion">16.0300</meta:user-defined>
  </office:meta>
</office:document-meta>
</file>