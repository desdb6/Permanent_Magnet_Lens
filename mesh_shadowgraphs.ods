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5.41866666666667cm"/>
    </style:style>
    <style:style style:name="co3" style:family="table-column">
      <style:table-column-properties fo:break-before="auto" style:column-width="4.78366666666667cm"/>
    </style:style>
    <style:style style:name="co4" style:family="table-column">
      <style:table-column-properties fo:break-before="auto" style:column-width="3.97933333333333cm"/>
    </style:style>
    <style:style style:name="co5" style:family="table-column">
      <style:table-column-properties fo:break-before="auto" style:column-width="4.6355cm"/>
    </style:style>
    <style:style style:name="co6" style:family="table-column">
      <style:table-column-properties fo:break-before="auto" style:column-width="4.52966666666667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5.2281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4.72016666666667cm"/>
    </style:style>
    <style:style style:name="co12" style:family="table-column">
      <style:table-column-properties fo:break-before="auto" style:column-width="3.8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2">
            <text:p>Option 1: Parralel beam</text:p>
          </table:table-cell>
          <table:table-cell table:number-columns-repeated="5" table:style-name="ce2"/>
          <table:table-cell office:value-type="string" table:style-name="ce2">
            <text:p>Setup</text:p>
          </table:table-cell>
          <table:table-cell table:number-columns-repeated="7" table:style-name="ce2"/>
          <table:table-cell office:value-type="string" table:style-name="ce2">
            <text:p>Measurements</text:p>
          </table:table-cell>
          <table:table-cell table:number-columns-repeated="16369" table:style-name="ce2"/>
        </table:table-row>
        <table:table-row table:style-name="ro2">
          <table:table-cell table:number-columns-repeated="6" table:style-name="ce2"/>
          <table:table-cell office:value-type="string" table:style-name="ce2">
            <text:p>3<text:span text:style-name="T2">rd</text:span><text:s/>run</text:p>
          </table:table-cell>
          <table:table-cell table:number-columns-repeated="7" table:style-name="ce2"/>
          <table:table-cell office:value-type="string" table:style-name="ce2">
            <text:p>Lens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style-name="ce2">
            <text:p>43.14</text:p>
          </table:table-cell>
          <table:table-cell table:number-columns-repeated="4"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</text:p>
          </table:table-cell>
          <table:table-cell office:value-type="float" office:value="8.4" table:style-name="ce2">
            <text:p>8.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43.14" table:formula="of:=[.P3]/2+[.P7]+4+9+[.H7]+[.P12]" table:style-name="ce2">
            <text:p>43.1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4" table:style-name="ce2"/>
          <table:table-cell office:value-type="string" table:style-name="ce2">
            <text:p>4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26.92" table:formula="of:=[.J4]+[.P13]+82.64" table:style-name="ce2">
            <text:p>126.92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4"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orrection term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 with lens</text:p>
          </table:table-cell>
          <table:table-cell office:value-type="float" office:value="9.24" table:style-name="ce2">
            <text:p>9.2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5]-[.B6]" table:style-name="ce2">
            <text:p>0.204</text:p>
          </table:table-cell>
          <table:table-cell table:number-columns-repeated="4" table:style-name="ce2"/>
          <table:table-cell office:value-type="string" table:style-name="ce2">
            <text:p>gap</text:p>
          </table:table-cell>
          <table:table-cell office:value-type="float" office:value="24.61" table:style-name="ce2">
            <text:p>24.61</text:p>
          </table:table-cell>
          <table:table-cell table:number-columns-repeated="6" table:style-name="ce2"/>
          <table:table-cell office:value-type="string" table:style-name="ce2">
            <text:p>Bottom thickness</text:p>
          </table:table-cell>
          <table:table-cell office:value-type="float" office:value="0.83999999999999986" table:formula="of:=[.P6]-[.P3]" table:style-name="ce2">
            <text:p>0.8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4"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Total available length</text:p>
          </table:table-cell>
          <table:table-cell office:value-type="float" office:value="228.4" table:style-name="ce2">
            <text:p>228.4</text:p>
          </table:table-cell>
          <table:table-cell table:number-columns-repeated="4" table:style-name="ce2"/>
          <table:table-cell office:value-type="string" table:style-name="ce2">
            <text:p>Plate thickness</text:p>
          </table:table-cell>
          <table:table-cell table:number-columns-repeated="16369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gap</text:p>
          </table:table-cell>
          <table:table-cell table:style-name="ce2"/>
          <table:table-cell office:value-type="string" table:style-name="ce2">
            <text:p>Polepiece to lens</text:p>
          </table:table-cell>
          <table:table-cell office:value-type="float" office:value="101.48" table:formula="of:=[.J8]-[.J5]+[.J6]" table:style-name="ce2">
            <text:p>101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table:number-columns-repeated="4" table:style-name="ce2"/>
          <table:table-cell office:value-type="string" table:style-name="ce2">
            <text:p>detector</text:p>
          </table:table-cell>
          <table:table-cell table:number-columns-repeated="7" table:style-name="ce2"/>
          <table:table-cell office:value-type="string" table:style-name="ce2">
            <text:p>Grid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6319185188676695" table:formula="of:=[.C126]*1000" table:style-name="ce2">
            <text:p>0.863191852</text:p>
          </table:table-cell>
          <table:table-cell table:number-columns-repeated="12" table:style-name="ce2"/>
          <table:table-cell office:value-type="string" table:style-name="ce2">
            <text:p>Thickness</text:p>
          </table:table-cell>
          <table:table-cell office:value-type="float" office:value="1.63" table:style-name="ce2">
            <text:p>1.63</text:p>
          </table:table-cell>
          <table:table-cell table:number-columns-repeated="16368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Full stack length (top of plate)</text:p>
          </table:table-cell>
          <table:table-cell table:number-columns-repeated="7" table:style-name="ce2"/>
          <table:table-cell office:value-type="string" table:style-name="ce2">
            <text:p>Inset</text:p>
          </table:table-cell>
          <table:table-cell office:value-type="float" office:value="0.49" table:style-name="ce2">
            <text:p>0.49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2313326072880733" table:formula="of:=[.B11]/[.B7]" table:style-name="ce2">
            <text:p>4.231332607</text:p>
          </table:table-cell>
          <table:table-cell table:number-columns-repeated="4" table:style-name="ce2"/>
          <table:table-cell office:value-type="float" office:value="121.73" table:style-name="ce2">
            <text:p>121.73</text:p>
          </table:table-cell>
          <table:table-cell table:number-columns-repeated="7" table:style-name="ce2"/>
          <table:table-cell office:value-type="string" table:style-name="ce2">
            <text:p>Bottom thickness</text:p>
          </table:table-cell>
          <table:table-cell office:value-type="float" office:value="1.1399999999999999" table:formula="of:=[.P11]-[.P12]" table:style-name="ce2">
            <text:p>1.1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25.927383585038363" table:formula="of:=[.B4]/([.B13]-1)" table:style-name="ce2">
            <text:p>25.92738359</text:p>
          </table:table-cell>
          <table:table-cell table:number-columns-repeated="4" table:style-name="ce2"/>
          <table:table-cell office:value-type="string" table:style-name="ce2">
            <text:p>top of grid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17.212616414961637" table:formula="of:=[.B3]-[.B14]" table:style-name="ce2">
            <text:p>17.21261641</text:p>
          </table:table-cell>
          <table:table-cell table:number-columns-repeated="4" table:style-name="ce2"/>
          <table:table-cell office:value-type="float" office:value="82.64" table:style-name="ce2">
            <text:p>82.64</text:p>
          </table:table-cell>
          <table:table-cell table:number-columns-repeated="16377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office:value-type="string" table:style-name="ce2">
            <text:p>EXAMPLES WITH SIMULATED DATA</text:p>
          </table:table-cell>
          <table:table-cell table:number-columns-repeated="5" table:style-name="ce2"/>
          <table:table-cell office:value-type="string" table:style-name="ce2">
            <text:p>4<text:span text:style-name="T2">th</text:span><text:s/>run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2">
            <text:p>400 mesh</text:p>
          </table:table-cell>
          <table:table-cell office:value-type="string" table:style-name="ce2">
            <text:p>500 mesh</text:p>
          </table:table-cell>
          <table:table-cell office:value-type="string" table:style-name="ce2">
            <text:p>200 mesh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0" table:style-name="ce2">
            <text:p>0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.54" table:style-name="ce2">
            <text:p>17.54</text:p>
          </table:table-cell>
          <table:table-cell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10.48" table:formula="of:=[.P7]+9+4+[.P7]-4.2" table:style-name="ce2">
            <text:p>10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143.05000000000001" table:style-name="ce2">
            <text:p>143.05</text:p>
          </table:table-cell>
          <table:table-cell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31.28" table:formula="of:=[.G29]+4" table:style-name="ce2">
            <text:p>131.2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0.127" table:style-name="ce2">
            <text:p>0.127</text:p>
          </table:table-cell>
          <table:table-cell office:value-type="float" office:value="0.254" table:style-name="ce2">
            <text:p>0.254</text:p>
          </table:table-cell>
          <table:table-cell table:style-name="ce2"/>
          <table:table-cell office:value-type="string" table:style-name="ce2">
            <text:p>4mm spac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3E-2" table:style-name="ce2">
            <text:p>0.023</text:p>
          </table:table-cell>
          <table:table-cell office:value-type="float" office:value="2.3E-2" table:style-name="ce2">
            <text:p>0.02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0.05" table:style-name="ce2">
            <text:p>0.05</text:p>
          </table:table-cell>
          <table:table-cell table:style-name="ce2"/>
          <table:table-cell office:value-type="string" table:style-name="ce2">
            <text:p>gap</text:p>
          </table:table-cell>
          <table:table-cell office:value-type="float" office:value="8.89" table:style-name="ce2">
            <text:p>8.89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4.1000000000000002E-2" table:formula="of:=[.B22]-[.B23]" table:style-name="ce2">
            <text:p>0.041</text:p>
          </table:table-cell>
          <table:table-cell office:value-type="float" office:value="2.7999999999999997E-2" table:formula="of:=[.C22]-[.C23]" table:style-name="ce2">
            <text:p>0.028</text:p>
          </table:table-cell>
          <table:table-cell office:value-type="float" office:value="0.10100000000000001" table:formula="of:=[.D22]-[.D23]" table:style-name="ce2">
            <text:p>0.101</text:p>
          </table:table-cell>
          <table:table-cell office:value-type="float" office:value="0.20400000000000001" table:formula="of:=[.E22]-[.E23]" table:style-name="ce2">
            <text:p>0.204</text:p>
          </table:table-cell>
          <table:table-cell table:style-name="ce2"/>
          <table:table-cell office:value-type="string" table:style-name="ce2">
            <text:p>Lens pl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style-name="ce2"/>
          <table:table-cell office:value-type="string" table:style-name="ce2">
            <text:p>gap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detect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56" table:style-name="ce3">
            <text:p>56</text:p>
          </table:table-cell>
          <table:table-cell office:value-type="float" office:value="38" table:style-name="ce3">
            <text:p>38</text:p>
          </table:table-cell>
          <table:table-cell office:value-type="float" office:value="35" table:style-name="ce3">
            <text:p>35</text:p>
          </table:table-cell>
          <table:table-cell office:value-type="float" office:value="63" table:style-name="ce3">
            <text:p>6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3.08" table:formula="of:=[.B27]*[.B25]" table:style-name="ce2">
            <text:p>3.08</text:p>
          </table:table-cell>
          <table:table-cell office:value-type="float" office:value="2.09" table:formula="of:=[.C27]*[.C25]" table:style-name="ce2">
            <text:p>2.09</text:p>
          </table:table-cell>
          <table:table-cell office:value-type="float" office:value="1.925" table:formula="of:=[.D27]*[.D25]" table:style-name="ce2">
            <text:p>1.925</text:p>
          </table:table-cell>
          <table:table-cell office:value-type="float" office:value="3.4649999999999999" table:formula="of:=[.E27]*[.E25]" table:style-name="ce2">
            <text:p>3.465</text:p>
          </table:table-cell>
          <table:table-cell table:style-name="ce2"/>
          <table:table-cell office:value-type="string" table:style-name="ce2">
            <text:p>Full stack length (top of plate)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float" office:value="127.28" table:style-name="ce2">
            <text:p>127.2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75.121951219512198" table:formula="of:=[.B28]/[.B24]" table:style-name="ce2">
            <text:p>75.12195122</text:p>
          </table:table-cell>
          <table:table-cell office:value-type="float" office:value="74.642857142857139" table:formula="of:=[.C28]/[.C24]" table:style-name="ce2">
            <text:p>74.64285714</text:p>
          </table:table-cell>
          <table:table-cell office:value-type="float" office:value="19.059405940594058" table:formula="of:=[.D28]/[.D24]" table:style-name="ce2">
            <text:p>19.05940594</text:p>
          </table:table-cell>
          <table:table-cell office:value-type="float" office:value="16.985294117647058" table:formula="of:=[.E28]/[.E24]" table:style-name="ce2">
            <text:p>16.98529412</text:p>
          </table:table-cell>
          <table:table-cell table:style-name="ce2"/>
          <table:table-cell office:value-type="string" table:style-name="ce2">
            <text:p>top of lens plate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1.4840408028956893" table:formula="of:=[.B21]/([.B30]-1)" table:style-name="ce2">
            <text:p>1.484040803</text:p>
          </table:table-cell>
          <table:table-cell office:value-type="float" office:value="1.4936954413191077" table:formula="of:=[.C21]/([.C30]-1)" table:style-name="ce2">
            <text:p>1.493695441</text:p>
          </table:table-cell>
          <table:table-cell office:value-type="float" office:value="6.3678728070175445" table:formula="of:=[.D21]/([.D30]-1)" table:style-name="ce2">
            <text:p>6.367872807</text:p>
          </table:table-cell>
          <table:table-cell office:value-type="float" office:value="8.9488500459981619" table:formula="of:=[.E21]/([.E30]-1)" table:style-name="ce2">
            <text:p>8.948850046</text:p>
          </table:table-cell>
          <table:table-cell table:style-name="ce2"/>
          <table:table-cell office:value-type="float" office:value="104.03" table:style-name="ce2">
            <text:p>104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8.5159591971043103" table:formula="of:=[.B20]-[.B31]" table:style-name="ce2">
            <text:p>8.515959197</text:p>
          </table:table-cell>
          <table:table-cell office:value-type="float" office:value="8.5063045586808919" table:formula="of:=[.C20]-[.C31]" table:style-name="ce2">
            <text:p>8.506304559</text:p>
          </table:table-cell>
          <table:table-cell office:value-type="float" office:value="8.6321271929824555" table:formula="of:=[.D20]-[.D31]" table:style-name="ce2">
            <text:p>8.632127193</text:p>
          </table:table-cell>
          <table:table-cell office:value-type="float" office:value="8.5911499540018372" table:formula="of:=[.E20]-[.E31]" table:style-name="ce2">
            <text:p>8.591149954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Option 2: Point source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Working distance</text:p>
          </table:table-cell>
          <table:table-cell office:value-type="float" office:value="86" table:style-name="ce2">
            <text:p>86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15.480000000000004" table:formula="of:=[.J9]-[.B37]" table:style-name="ce2">
            <text:p>15.4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formula="of:=[.J4]" table:style-name="ce2">
            <text:p>43.1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42]-[.B43]" table:style-name="ce2">
            <text:p>0.20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office:value-type="string" table:style-name="ce2">
            <text:p>REMOVED FORMUL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9411297192116601" table:formula="of:=[.C131]*1000" table:style-name="ce1">
            <text:p>0.894112972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382906725103755" table:formula="of:=[.B48]/[.B44]" table:style-name="ce2">
            <text:p>4.38290672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24.765684308789339" table:formula="of:=[.B41]/([.B50]-1)" table:style-name="ce2">
            <text:p>24.7656843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8.374315691210661" table:formula="of:=[.B40]-[.B51]" table:style-name="ce2">
            <text:p>18.37431569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4017178044389365" table:formula="of:=[.B52]*[.B39]/([.B52]+[.B39])" table:style-name="ce2">
            <text:p>8.401717804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EXAMPLES WITH SIMULATED DATA</text:p>
          </table:table-cell>
          <table:table-cell table:number-columns-repeated="16383" table:style-name="ce2"/>
        </table:table-row>
        <table:table-row table:style-name="ro1">
          <table:table-cell table:style-name="ce2"/>
          <table:table-cell office:value-type="string" table:style-name="ce2">
            <text:p>200 mesh</text:p>
          </table:table-cell>
          <table:table-cell office:value-type="string" table:style-name="ce2">
            <text:p>300 mesh</text:p>
          </table:table-cell>
          <table:table-cell office:value-type="string" table:style-name="ce2">
            <text:p>500 mesh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2">
            <text:p>140</text:p>
          </table:table-cell>
          <table:table-cell office:value-type="float" office:value="145" table:style-name="ce2">
            <text:p>14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127" table:style-name="ce2">
            <text:p>0.127</text:p>
          </table:table-cell>
          <table:table-cell office:value-type="float" office:value="8.5000000000000006E-2" table:style-name="ce2">
            <text:p>0.085</text:p>
          </table:table-cell>
          <table:table-cell office:value-type="float" office:value="5.0999999999999997E-2" table:style-name="ce2">
            <text:p>0.05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2.3E-2" table:style-name="ce2">
            <text:p>0.02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10100000000000001" table:formula="of:=[.B60]-[.B61]" table:style-name="ce2">
            <text:p>0.101</text:p>
          </table:table-cell>
          <table:table-cell office:value-type="float" office:value="6.0000000000000005E-2" table:formula="of:=[.C60]-[.C61]" table:style-name="ce2">
            <text:p>0.06</text:p>
          </table:table-cell>
          <table:table-cell office:value-type="float" office:value="2.7999999999999997E-2" table:formula="of:=[.D60]-[.D61]" table:style-name="ce2">
            <text:p>0.02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1.87" table:formula="of:=[.B65]*[.B63]" table:style-name="ce2">
            <text:p>1.87</text:p>
          </table:table-cell>
          <table:table-cell office:value-type="float" office:value="1.7050000000000001" table:formula="of:=[.C65]*[.C63]" table:style-name="ce2">
            <text:p>1.705</text:p>
          </table:table-cell>
          <table:table-cell office:value-type="float" office:value="5.5" table:formula="of:=[.D65]*[.D63]" table:style-name="ce2">
            <text:p>5.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18.514851485148515" table:formula="of:=[.B66]/[.B62]" table:style-name="ce2">
            <text:p>18.51485149</text:p>
          </table:table-cell>
          <table:table-cell office:value-type="float" office:value="28.416666666666664" table:formula="of:=[.C66]/[.C62]" table:style-name="ce2">
            <text:p>28.41666667</text:p>
          </table:table-cell>
          <table:table-cell office:value-type="float" office:value="196.42857142857144" table:formula="of:=[.D66]/[.D62]" table:style-name="ce2">
            <text:p>196.428571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5.1384963256076874" table:formula="of:=[.B59]/([.B68]-1)" table:style-name="ce2">
            <text:p>5.138496326</text:p>
          </table:table-cell>
          <table:table-cell office:value-type="float" office:value="5.1063829787234045" table:formula="of:=[.C59]/([.C68]-1)" table:style-name="ce2">
            <text:p>5.106382979</text:p>
          </table:table-cell>
          <table:table-cell office:value-type="float" office:value="0.74195906432748537" table:formula="of:=[.D59]/([.D68]-1)" table:style-name="ce2">
            <text:p>0.7419590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4.861503674392313" table:formula="of:=[.B58]-[.B69]" table:style-name="ce2">
            <text:p>14.86150367</text:p>
          </table:table-cell>
          <table:table-cell office:value-type="float" office:value="14.893617021276595" table:formula="of:=[.C58]-[.C69]" table:style-name="ce2">
            <text:p>14.89361702</text:p>
          </table:table-cell>
          <table:table-cell office:value-type="float" office:value="19.258040935672515" table:formula="of:=[.D58]-[.D69]" table:style-name="ce2">
            <text:p>19.258040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5260256202367444" table:formula="of:=[.B70]*[.B57]/([.B70]+[.B57])" table:style-name="ce2">
            <text:p>8.52602562</text:p>
          </table:table-cell>
          <table:table-cell office:value-type="float" office:value="8.5365853658536572" table:formula="of:=[.C70]*[.C57]/([.C70]+[.C57])" table:style-name="ce2">
            <text:p>8.536585366</text:p>
          </table:table-cell>
          <table:table-cell office:value-type="float" office:value="8.4321988690920744" table:formula="of:=[.D70]*[.D57]/([.D70]+[.D57])" table:style-name="ce2">
            <text:p>8.432198869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SECOND TRY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Option 1: Point source virtual image</text:p>
          </table:table-cell>
          <table:table-cell table:number-columns-repeated="16383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.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78]+[.B79]" table:style-name="ce1">
            <text:p>126.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7320508075688773" table:formula="of:=SQRT(3)*[.J78]" table:style-name="ce1">
            <text:p>0.173205081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4142135623730953" table:formula="of:=SQRT(2)*[.J78]" table:style-name="ce1">
            <text:p>0.1414213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.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.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.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.1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office:value-type="string" table:style-name="ce1">
            <text:p>Object point position (mm)</text:p>
          </table:table-cell>
          <table:table-cell office:value-type="string" table:style-name="ce1">
            <text:p>Image point position (mm)</text:p>
          </table:table-cell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office:value-type="string" table:style-name="ce1">
            <text:p>s_z'</text:p>
          </table:table-cell>
          <table:table-cell office:value-type="string" table:style-name="ce1">
            <text:p>s_z</text:p>
          </table:table-cell>
          <table:table-cell table:number-columns-repeated="16372" table:style-name="ce1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float" office:value="0.36157297483901402" table:style-name="ce1">
            <text:p>0.361572975</text:p>
          </table:table-cell>
          <table:table-cell office:value-type="float" office:value="6.5740540879820726" table:formula="of:=[.B82]/0.055" table:style-name="ce1">
            <text:p>6.574054088</text:p>
          </table:table-cell>
          <table:table-cell office:value-type="float" office:value="1.7724165433285002" table:formula="of:=[.B82]/[.$E$78]" table:style-name="ce1">
            <text:p>1.772416543</text:p>
          </table:table-cell>
          <table:table-cell office:value-type="float" office:value="17.480000000000004" table:formula="of:=[.$B$77]-[.A82]" table:style-name="ce1">
            <text:p>17.48</text:p>
          </table:table-cell>
          <table:table-cell office:value-type="float" office:value="-65.324792376112143" table:formula="of:=[.$B$78]-([.$B$79])/([.D82]-1)" table:style-name="ce1">
            <text:p>-65.32479238</text:p>
          </table:table-cell>
          <table:table-cell office:value-type="float" office:value="23.866283330441519" table:formula="of:=[.E82]*[.F82]/([.E82]+[.F82])" table:style-name="ce1">
            <text:p>23.86628333</text:p>
          </table:table-cell>
          <table:table-cell office:value-type="float" office:value="0.77364193919284063" table:formula="of:=SQRT(([.L82]^2*[.F82]^4+[.K82]^2*[.E82]^4)/([.E82]+[.F82])^4)" table:style-name="ce1">
            <text:p>0.773641939</text:p>
          </table:table-cell>
          <table:table-cell office:value-type="float" office:value="7.3740193467988803E-3" table:style-name="ce1">
            <text:p>0.007374019</text:p>
          </table:table-cell>
          <table:table-cell office:value-type="float" office:value="3.6147153660778829E-2" table:formula="of:=[.I82]/[.$E$78]" table:style-name="ce1">
            <text:p>0.036147154</text:p>
          </table:table-cell>
          <table:table-cell office:value-type="float" office:value="5.0785151825643879" table:formula="of:=SQRT([.$J$78]^2+([.$J$79]/([.D82]-1))^2+([.J82]*[.$B$79]/([.D82]-1)^2)^2)" table:style-name="ce1">
            <text:p>5.078515183</text:p>
          </table:table-cell>
          <table:table-cell office:value-type="float" office:value="0.2" table:formula="of:=SQRT(4)*0.1" table:style-name="ce1">
            <text:p>0.2</text:p>
          </table:table-cell>
          <table:table-cell table:number-columns-repeated="1637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40213118843787499" table:style-name="ce1">
            <text:p>0.402131188</text:p>
          </table:table-cell>
          <table:table-cell office:value-type="float" office:value="7.3114761534159092" table:formula="of:=[.B83]/0.055" table:style-name="ce1">
            <text:p>7.311476153</text:p>
          </table:table-cell>
          <table:table-cell office:value-type="float" office:value="1.9712313158719363" table:formula="of:=[.B83]/[.$E$78]" table:style-name="ce1">
            <text:p>1.971231316</text:p>
          </table:table-cell>
          <table:table-cell office:value-type="float" office:value="15.480000000000004" table:formula="of:=[.$B$77]-[.A83]" table:style-name="ce1">
            <text:p>15.48</text:p>
          </table:table-cell>
          <table:table-cell office:value-type="float" office:value="-43.121633692057543" table:formula="of:=[.$B$78]-([.$B$79])/([.D83]-1)" table:style-name="ce1">
            <text:p>-43.12163369</text:p>
          </table:table-cell>
          <table:table-cell office:value-type="float" office:value="24.149183691152629" table:formula="of:=[.E83]*[.F83]/([.E83]+[.F83])" table:style-name="ce1">
            <text:p>24.14918369</text:p>
          </table:table-cell>
          <table:table-cell office:value-type="float" office:value="0.97795651161025587" table:formula="of:=SQRT(([.L83]^2*[.F83]^4+[.K83]^2*[.E83]^4)/([.E83]+[.F83])^4)" table:style-name="ce1">
            <text:p>0.977956512</text:p>
          </table:table-cell>
          <table:table-cell office:value-type="float" office:value="6.4542271177711096E-3" table:style-name="ce1">
            <text:p>0.006454227</text:p>
          </table:table-cell>
          <table:table-cell office:value-type="float" office:value="3.1638368224368184E-2" table:formula="of:=[.I83]/[.$E$78]" table:style-name="ce1">
            <text:p>0.031638368</text:p>
          </table:table-cell>
          <table:table-cell office:value-type="float" office:value="2.813681127387015" table:formula="of:=SQRT([.$J$78]^2+([.$J$79]/([.D83]-1))^2+([.J83]*[.$B$79]/([.D83]-1)^2)^2)" table:style-name="ce1">
            <text:p>2.813681127</text:p>
          </table:table-cell>
          <table:table-cell office:value-type="float" office:value="0.17320508075688773" table:formula="of:=SQRT(3)*0.1" table:style-name="ce1">
            <text:p>0.173205081</text:p>
          </table:table-cell>
          <table:table-cell table:number-columns-repeated="1637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45978296018084902" table:style-name="ce1">
            <text:p>0.45978296</text:p>
          </table:table-cell>
          <table:table-cell office:value-type="float" office:value="8.359690185106345" table:formula="of:=[.B84]/0.055" table:style-name="ce1">
            <text:p>8.359690185</text:p>
          </table:table-cell>
          <table:table-cell office:value-type="float" office:value="2.2538380401022011" table:formula="of:=[.B84]/[.$E$78]" table:style-name="ce1">
            <text:p>2.25383804</text:p>
          </table:table-cell>
          <table:table-cell office:value-type="float" office:value="13.480000000000004" table:formula="of:=[.$B$77]-[.A84]" table:style-name="ce1">
            <text:p>13.48</text:p>
          </table:table-cell>
          <table:table-cell office:value-type="float" office:value="-23.678837298293359" table:formula="of:=[.$B$78]-([.$B$79])/([.D84]-1)" table:style-name="ce1">
            <text:p>-23.6788373</text:p>
          </table:table-cell>
          <table:table-cell office:value-type="float" office:value="31.296776038814446" table:formula="of:=[.E84]*[.F84]/([.E84]+[.F84])" table:style-name="ce1">
            <text:p>31.29677604</text:p>
          </table:table-cell>
          <table:table-cell office:value-type="float" office:value="6.1035607838245616" table:formula="of:=SQRT(([.L84]^2*[.F84]^4+[.K84]^2*[.E84]^4)/([.E84]+[.F84])^4)" table:style-name="ce1">
            <text:p>6.103560784</text:p>
          </table:table-cell>
          <table:table-cell office:value-type="float" office:value="1.32080262050626E-2" table:style-name="ce1">
            <text:p>0.013208026</text:p>
          </table:table-cell>
          <table:table-cell office:value-type="float" office:value="6.4745226495404901E-2" table:formula="of:=[.I84]/[.$E$78]" table:style-name="ce1">
            <text:p>0.064745226</text:p>
          </table:table-cell>
          <table:table-cell office:value-type="float" office:value="3.452736564052568" table:formula="of:=SQRT([.$J$78]^2+([.$J$79]/([.D84]-1))^2+([.J84]*[.$B$79]/([.D84]-1)^2)^2)" table:style-name="ce1">
            <text:p>3.452736564</text:p>
          </table:table-cell>
          <table:table-cell office:value-type="float" office:value="0.17320508075688773" table:formula="of:=SQRT(3)*0.1" table:style-name="ce1">
            <text:p>0.173205081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48805777271755402" table:style-name="ce1">
            <text:p>0.488057773</text:p>
          </table:table-cell>
          <table:table-cell office:value-type="float" office:value="8.8737776857737085" table:formula="of:=[.B85]/0.055" table:style-name="ce1">
            <text:p>8.873777686</text:p>
          </table:table-cell>
          <table:table-cell office:value-type="float" office:value="2.3924400623409512" table:formula="of:=[.B85]/[.$E$78]" table:style-name="ce1">
            <text:p>2.392440062</text:p>
          </table:table-cell>
          <table:table-cell office:value-type="float" office:value="11.480000000000004" table:formula="of:=[.$B$77]-[.A85]" table:style-name="ce1">
            <text:p>11.48</text:p>
          </table:table-cell>
          <table:table-cell office:value-type="float" office:value="-17.027760369627842" table:formula="of:=[.$B$78]-([.$B$79])/([.D85]-1)" table:style-name="ce1">
            <text:p>-17.02776037</text:p>
          </table:table-cell>
          <table:table-cell office:value-type="float" office:value="35.235604283398608" table:formula="of:=[.E85]*[.F85]/([.E85]+[.F85])" table:style-name="ce1">
            <text:p>35.23560428</text:p>
          </table:table-cell>
          <table:table-cell office:value-type="float" office:value="3.8865280207432749" table:formula="of:=SQRT(([.L85]^2*[.F85]^4+[.K85]^2*[.E85]^4)/([.E85]+[.F85])^4)" table:style-name="ce1">
            <text:p>3.886528021</text:p>
          </table:table-cell>
          <table:table-cell office:value-type="float" office:value="3.8454369348915E-3" table:style-name="ce1">
            <text:p>0.003845437</text:p>
          </table:table-cell>
          <table:table-cell office:value-type="float" office:value="1.8850181053389706E-2" table:formula="of:=[.I85]/[.$E$78]" table:style-name="ce1">
            <text:p>0.018850181</text:p>
          </table:table-cell>
          <table:table-cell office:value-type="float" office:value="0.82377412655009752" table:formula="of:=SQRT([.$J$78]^2+([.$J$79]/([.D85]-1))^2+([.J85]*[.$B$79]/([.D85]-1)^2)^2)" table:style-name="ce1">
            <text:p>0.823774127</text:p>
          </table:table-cell>
          <table:table-cell office:value-type="float" office:value="0.17320508075688773" table:formula="of:=SQRT(3)*0.1" table:style-name="ce1">
            <text:p>0.173205081</text:p>
          </table:table-cell>
          <table:table-cell table:number-columns-repeated="1637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51709116692169599" table:style-name="ce1">
            <text:p>0.517091167</text:p>
          </table:table-cell>
          <table:table-cell office:value-type="float" office:value="9.4016575803944722" table:formula="of:=[.B86]/0.055" table:style-name="ce1">
            <text:p>9.40165758</text:p>
          </table:table-cell>
          <table:table-cell office:value-type="float" office:value="2.5347606221651766" table:formula="of:=[.B86]/[.$E$78]" table:style-name="ce1">
            <text:p>2.534760622</text:p>
          </table:table-cell>
          <table:table-cell office:value-type="float" office:value="9.480000000000004" table:formula="of:=[.$B$77]-[.A86]" table:style-name="ce1">
            <text:p>9.48</text:p>
          </table:table-cell>
          <table:table-cell office:value-type="float" office:value="-11.448317415784786" table:formula="of:=[.$B$78]-([.$B$79])/([.D86]-1)" table:style-name="ce1">
            <text:p>-11.44831742</text:p>
          </table:table-cell>
          <table:table-cell office:value-type="float" office:value="55.138489468868592" table:formula="of:=[.E86]*[.F86]/([.E86]+[.F86])" table:style-name="ce1">
            <text:p>55.13848947</text:p>
          </table:table-cell>
          <table:table-cell office:value-type="float" office:value="10.842419922521772" table:formula="of:=SQRT(([.L86]^2*[.F86]^4+[.K86]^2*[.E86]^4)/([.E86]+[.F86])^4)" table:style-name="ce1">
            <text:p>10.84241992</text:p>
          </table:table-cell>
          <table:table-cell office:value-type="float" office:value="2.1492706006442002E-3" table:style-name="ce1">
            <text:p>0.002149271</text:p>
          </table:table-cell>
          <table:table-cell office:value-type="float" office:value="1.0535640199236276E-2" table:formula="of:=[.I86]/[.$E$78]" table:style-name="ce1">
            <text:p>0.01053564</text:p>
          </table:table-cell>
          <table:table-cell office:value-type="float" office:value="0.39327975012498062" table:formula="of:=SQRT([.$J$78]^2+([.$J$79]/([.D86]-1))^2+([.J86]*[.$B$79]/([.D86]-1)^2)^2)" table:style-name="ce1">
            <text:p>0.39327975</text:p>
          </table:table-cell>
          <table:table-cell office:value-type="float" office:value="0.17320508075688773" table:formula="of:=SQRT(3)*0.1" table:style-name="ce1">
            <text:p>0.173205081</text:p>
          </table:table-cell>
          <table:table-cell table:number-columns-repeated="1637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55787813901751304" table:style-name="ce1">
            <text:p>0.557878139</text:p>
          </table:table-cell>
          <table:table-cell office:value-type="float" office:value="10.14323889122751" table:formula="of:=[.B87]/0.055" table:style-name="ce1">
            <text:p>10.14323889</text:p>
          </table:table-cell>
          <table:table-cell office:value-type="float" office:value="2.7346967598897698" table:formula="of:=[.B87]/[.$E$78]" table:style-name="ce1">
            <text:p>2.73469676</text:p>
          </table:table-cell>
          <table:table-cell office:value-type="float" office:value="6.480000000000004" table:formula="of:=[.$B$77]-[.A87]" table:style-name="ce1">
            <text:p>6.48</text:p>
          </table:table-cell>
          <table:table-cell office:value-type="float" office:value="-5.1566256334759899" table:formula="of:=[.$B$78]-([.$B$79])/([.D87]-1)" table:style-name="ce1">
            <text:p>-5.156625633</text:p>
          </table:table-cell>
          <table:table-cell office:value-type="float" office:value="-25.24979699636496" table:formula="of:=[.E87]*[.F87]/([.E87]+[.F87])" table:style-name="ce1">
            <text:p>-25.249797</text:p>
          </table:table-cell>
          <table:table-cell office:value-type="float" office:value="17.638705984315589" table:formula="of:=SQRT(([.L87]^2*[.F87]^4+[.K87]^2*[.E87]^4)/([.E87]+[.F87])^4)" table:style-name="ce1">
            <text:p>17.63870598</text:p>
          </table:table-cell>
          <table:table-cell office:value-type="float" office:value="5.2626020383051298E-3" table:style-name="ce1">
            <text:p>0.005262602</text:p>
          </table:table-cell>
          <table:table-cell office:value-type="float" office:value="2.5797068815221227E-2" table:formula="of:=[.I87]/[.$E$78]" table:style-name="ce1">
            <text:p>0.025797069</text:p>
          </table:table-cell>
          <table:table-cell office:value-type="float" office:value="0.72744594683888064" table:formula="of:=SQRT([.$J$78]^2+([.$J$79]/([.D87]-1))^2+([.J87]*[.$B$79]/([.D87]-1)^2)^2)" table:style-name="ce1">
            <text:p>0.727445947</text:p>
          </table:table-cell>
          <table:table-cell office:value-type="float" office:value="0.17320508075688773" table:formula="of:=SQRT(3)*0.1" table:style-name="ce1">
            <text:p>0.173205081</text:p>
          </table:table-cell>
          <table:table-cell table:number-columns-repeated="1637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24.346970387416512" table:formula="of:=SUM([.G82:.G87]/[.H82:.H87]^2)/SUM(1/[.H82:.H87]^2)" table:number-matrix-columns-spanned="1" table:number-matrix-rows-spanned="1" table:style-name="ce1">
            <text:p>24.3469703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Error</text:p>
          </table:table-cell>
          <table:table-cell office:value-type="float" office:value="0.59537120577917346" table:formula="of:=SQRT(1/SUM(1/[.H82:.H87]^2))" table:number-matrix-columns-spanned="1" table:number-matrix-rows-spanned="1" table:style-name="ce1">
            <text:p>0.595371206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Option 2: Parallel beam</text:p>
          </table:table-cell>
          <table:table-cell table:number-columns-repeated="16383" table:style-name="ce1"/>
        </table:table-row>
        <table:table-row table:style-name="ro3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.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95]+[.B96]" table:style-name="ce1">
            <text:p>126.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7320508075688773" table:formula="of:=SQRT(3)*[.J95]" table:style-name="ce1">
            <text:p>0.173205081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4142135623730953" table:formula="of:=SQRT(2)*[.J95]" table:style-name="ce1">
            <text:p>0.14142135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.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.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.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.1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table:style-name="ce1"/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olution</text:p>
          </table:table-cell>
          <table:table-cell office:value-type="float" office:value="270" table:style-name="ce1">
            <text:p>270</text:p>
          </table:table-cell>
          <table:table-cell office:value-type="float" office:value="0.84461202976911798" table:style-name="ce1">
            <text:p>0.84461203</text:p>
          </table:table-cell>
          <table:table-cell office:value-type="float" office:value="14.852118073858582" table:formula="of:=[.C100]/0.055" table:style-name="ce1">
            <text:p>14.85211807</text:p>
          </table:table-cell>
          <table:table-cell office:value-type="float" office:value="4.0042475199128535" table:formula="of:=[.C100]/[.$E$78]" table:style-name="ce1">
            <text:p>4.00424752</text:p>
          </table:table-cell>
          <table:table-cell table:style-name="ce1"/>
          <table:table-cell office:value-type="float" office:value="15.252817121529898" table:formula="of:=[.$B$95]-([.$B$96])/([.E99]-1)" table:style-name="ce1">
            <text:p>15.25281712</text:p>
          </table:table-cell>
          <table:table-cell office:value-type="float" office:value="0.47517172524104945" table:formula="of:=SQRT([.$J$95]^2+([.$J$96]/([.E99]-1))^2+([.J99]*[.$B$96]/([.E99]-1)^2)^2)" table:style-name="ce1">
            <text:p>0.475171725</text:p>
          </table:table-cell>
          <table:table-cell office:value-type="float" office:value="1.01825658334725E-2" table:style-name="ce1">
            <text:p>0.010182566</text:p>
          </table:table-cell>
          <table:table-cell office:value-type="float" office:value="4.9914538399375007E-2" table:formula="of:=[.I99]/[.$E$78]" table:style-name="ce1">
            <text:p>0.0499145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1</text:p>
          </table:table-cell>
          <table:table-cell office:value-type="float" office:value="270" table:style-name="ce1">
            <text:p>270</text:p>
          </table:table-cell>
          <table:table-cell office:value-type="float" office:value="0.816866494062222" table:style-name="ce1">
            <text:p>0.816866494</text:p>
          </table:table-cell>
          <table:table-cell office:value-type="float" office:value="15.708906837093563" table:formula="of:=[.C101]/0.055" table:style-name="ce1">
            <text:p>15.70890684</text:p>
          </table:table-cell>
          <table:table-cell office:value-type="float" office:value="4.2352444903928728" table:formula="of:=[.C101]/[.$E$78]" table:style-name="ce1">
            <text:p>4.23524449</text:p>
          </table:table-cell>
          <table:table-cell table:style-name="ce1"/>
          <table:table-cell office:value-type="float" office:value="17.243966408478094" table:formula="of:=[.$B$95]-([.$B$96])/([.E100]-1)" table:style-name="ce1">
            <text:p>17.24396641</text:p>
          </table:table-cell>
          <table:table-cell office:value-type="float" office:value="2.4454664808000843" table:formula="of:=SQRT([.$J$95]^2+([.$J$96]/([.E100]-1))^2+([.J100]*[.$B$96]/([.E100]-1)^2)^2)" table:style-name="ce1">
            <text:p>2.445466481</text:p>
          </table:table-cell>
          <table:table-cell office:value-type="float" office:value="6.2268381672499998E-2" table:style-name="ce1">
            <text:p>0.062268382</text:p>
          </table:table-cell>
          <table:table-cell office:value-type="float" office:value="0.30523716506127452" table:formula="of:=[.I100]/[.$E$78]" table:style-name="ce1">
            <text:p>0.305237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2</text:p>
          </table:table-cell>
          <table:table-cell office:value-type="float" office:value="270" table:style-name="ce1">
            <text:p>270</text:p>
          </table:table-cell>
          <table:table-cell office:value-type="float" office:value="0.86398987604014599" table:style-name="ce1">
            <text:p>0.863989876</text:p>
          </table:table-cell>
          <table:table-cell office:value-type="float" office:value="15.356582359438509" table:formula="of:=[.C99]/0.055" table:style-name="ce1">
            <text:p>15.35658236</text:p>
          </table:table-cell>
          <table:table-cell office:value-type="float" office:value="4.1402550478878331" table:formula="of:=[.C99]/[.$E$78]" table:style-name="ce1">
            <text:p>4.140255048</text:p>
          </table:table-cell>
          <table:table-cell table:style-name="ce1"/>
          <table:table-cell office:value-type="float" office:value="16.46063838051904" table:formula="of:=[.$B$95]-([.$B$96])/([.E101]-1)" table:style-name="ce1">
            <text:p>16.46063838</text:p>
          </table:table-cell>
          <table:table-cell office:value-type="float" office:value="0.37410325422522511" table:formula="of:=SQRT([.$J$95]^2+([.$J$96]/([.E101]-1))^2+([.J101]*[.$B$96]/([.E101]-1)^2)^2)" table:style-name="ce1">
            <text:p>0.374103254</text:p>
          </table:table-cell>
          <table:table-cell office:value-type="float" office:value="8.62208084550997E-3" table:style-name="ce1">
            <text:p>0.008622081</text:p>
          </table:table-cell>
          <table:table-cell office:value-type="float" office:value="4.2265102183872402E-2" table:formula="of:=[.I101]/[.$E$78]" table:style-name="ce1">
            <text:p>0.042265102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16.016195966869184" table:formula="of:=SUM([.G99:.G101]/[.H99:.H101]^2)/SUM(1/[.H99:.H101]^2)" table:number-matrix-columns-spanned="1" table:number-matrix-rows-spanned="1" table:style-name="ce1">
            <text:p>16.016195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0.2918369396688027" table:formula="of:=SQRT(1/SUM(1/[.H99:.H101]^2))" table:number-matrix-columns-spanned="1" table:number-matrix-rows-spanned="1" table:style-name="ce1">
            <text:p>0.29183694</text:p>
          </table:table-cell>
          <table:table-cell table:number-columns-repeated="16382" table:style-name="ce1"/>
        </table:table-row>
        <table:table-row table:number-rows-repeated="1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esolution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(m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2701603043439102E-4" table:style-name="ce1">
            <text:p>0.000427016</text:p>
          </table:table-cell>
          <table:table-cell office:value-type="float" office:value="9.5161558663267593E-6" table:style-name="ce4">
            <text:p>9.52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1031643688332197E-4" table:style-name="ce1">
            <text:p>0.000510316</text:p>
          </table:table-cell>
          <table:table-cell office:value-type="float" office:value="2.0476979474055301E-5" table:style-name="ce4">
            <text:p>2.05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9354032641543005E-4" table:style-name="ce1">
            <text:p>0.00049354</text:p>
          </table:table-cell>
          <table:table-cell office:value-type="float" office:value="1.42915207469048E-5" table:style-name="ce4">
            <text:p>1.43E-0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398795150005795E-4" table:style-name="ce1">
            <text:p>0.000523988</text:p>
          </table:table-cell>
          <table:table-cell office:value-type="float" office:value="6.3284483070371698E-6" table:style-name="ce4">
            <text:p>6.33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4265300028312697E-4" table:style-name="ce1">
            <text:p>0.000542653</text:p>
          </table:table-cell>
          <table:table-cell office:value-type="float" office:value="5.2606940138437097E-6" table:style-name="ce4">
            <text:p>5.26E-0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7129160818605995E-4" table:style-name="ce1">
            <text:p>0.000871292</text:p>
          </table:table-cell>
          <table:table-cell office:value-type="float" office:value="1.32418724502264E-5" table:style-name="ce4">
            <text:p>1.32E-05</text:p>
          </table:table-cell>
          <table:table-cell office:value-type="float" office:value="17.52732963170352" table:style-name="ce1">
            <text:p>17.52732963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Overview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calculated focal length (mm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270 (parallel)</text:p>
          </table:table-cell>
          <table:table-cell office:value-type="float" office:value="8.6319185188676699E-4" table:style-name="ce1">
            <text:p>0.000863192</text:p>
          </table:table-cell>
          <table:table-cell office:value-type="float" office:value="1.00227825556606E-5" table:style-name="ce4">
            <text:p>1.00E-05</text:p>
          </table:table-cell>
          <table:table-cell office:value-type="float" office:value="17.212616414961637" table:style-name="ce1">
            <text:p>17.2126164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300824113510595E-4" table:style-name="ce1">
            <text:p>0.000973008</text:p>
          </table:table-cell>
          <table:table-cell office:value-type="float" office:value="1.9106340405498199E-5" table:style-name="ce4">
            <text:p>1.91E-05</text:p>
          </table:table-cell>
          <table:table-cell office:value-type="float" office:value="17.023112556158924" table:style-name="ce1">
            <text:p>17.02311256</text:p>
          </table:table-cell>
          <table:table-cell table:style-name="ce5"/>
          <table:table-cell office:value-type="string" table:style-name="ce6">
            <text:p>Stray electron images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7855244024918492E-4" table:style-name="ce1">
            <text:p>0.000978552</text:p>
          </table:table-cell>
          <table:table-cell office:value-type="float" office:value="3.6179419094112699E-5" table:style-name="ce4">
            <text:p>3.62E-05</text:p>
          </table:table-cell>
          <table:table-cell office:value-type="float" office:value="13.974406017036939" table:style-name="ce1">
            <text:p>13.97440602</text:p>
          </table:table-cell>
          <table:table-cell table:style-name="ce5"/>
          <table:table-cell table:number-columns-repeated="16378" table:style-name="ce1"/>
        </table:table-row>
        <table:table-row table:style-name="ro3">
          <table:table-cell/>
          <table:table-cell office:value-type="float" office:value="65" table:style-name="ce1">
            <text:p>65</text:p>
          </table:table-cell>
          <table:table-cell office:value-type="float" office:value="9.7020097007636901E-4" table:style-name="ce1">
            <text:p>0.000970201</text:p>
          </table:table-cell>
          <table:table-cell office:value-type="float" office:value="2.3085314932016799E-5" table:style-name="ce4">
            <text:p>2.31E-05</text:p>
          </table:table-cell>
          <table:table-cell office:value-type="float" office:value="13.260582260821371" table:style-name="ce1">
            <text:p>13.26058226</text:p>
          </table:table-cell>
          <table:table-cell table:style-name="ce5"/>
          <table:table-cell table:number-columns-repeated="16378"/>
        </table:table-row>
        <table:table-row table:style-name="ro3">
          <table:table-cell/>
          <table:table-cell office:value-type="float" office:value="70" table:style-name="ce1">
            <text:p>70</text:p>
          </table:table-cell>
          <table:table-cell office:value-type="float" office:value="9.1274591740251405E-4" table:style-name="ce1">
            <text:p>0.000912746</text:p>
          </table:table-cell>
          <table:table-cell office:value-type="float" office:value="1.9592918530021701E-5" table:style-name="ce4">
            <text:p>1.96E-05</text:p>
          </table:table-cell>
          <table:table-cell office:value-type="float" office:value="11.858528217553985" table:style-name="ce1">
            <text:p>11.85852822</text:p>
          </table:table-cell>
          <table:table-cell table:style-name="ce5"/>
          <table:table-cell table:number-columns-repeated="16378"/>
        </table:table-row>
        <table:table-row table:style-name="ro3">
          <table:table-cell/>
          <table:table-cell office:value-type="float" office:value="75" table:style-name="ce1">
            <text:p>75</text:p>
          </table:table-cell>
          <table:table-cell office:value-type="float" office:value="8.9411297192116602E-4" table:style-name="ce1">
            <text:p>0.000894113</text:p>
          </table:table-cell>
          <table:table-cell office:value-type="float" office:value="1.81234036675559E-5" table:style-name="ce4">
            <text:p>1.81E-05</text:p>
          </table:table-cell>
          <table:table-cell office:value-type="float" office:value="10.847381617697929" table:style-name="ce1">
            <text:p>10.84738162</text:p>
          </table:table-cell>
          <table:table-cell table:style-name="ce5"/>
          <table:table-cell table:number-columns-repeated="16378"/>
        </table:table-row>
        <table:table-row table:number-rows-repeated="10484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Des De Borger</meta:initial-creator>
    <dc:creator>Des De Borger</dc:creator>
    <meta:creation-date>2026-03-31T08:36:37Z</meta:creation-date>
    <dc:date>2026-04-10T13:39:18Z</dc:date>
    <meta:editing-cycles>2</meta:editing-cycles>
    <meta:editing-duration>PT6710S</meta:editing-duration>
    <meta:user-defined meta:name="AppVersion">16.0300</meta:user-defined>
  </office:meta>
</office:document-meta>
</file>