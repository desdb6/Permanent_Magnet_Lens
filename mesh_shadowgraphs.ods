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fo:border="thin solid #000000"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ce4" style:family="table-cell" style:parent-style-name="Default" style:data-style-name="N15"/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5.969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4.78366666666667cm"/>
    </style:style>
    <style:style style:name="co4" style:family="table-column">
      <style:table-column-properties fo:break-before="auto" style:column-width="2.3495cm"/>
    </style:style>
    <style:style style:name="co5" style:family="table-column">
      <style:table-column-properties fo:break-before="auto" style:column-width="4.6355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3.1115cm"/>
    </style:style>
    <style:style style:name="co8" style:family="table-column">
      <style:table-column-properties fo:break-before="auto" style:column-width="3.7465cm"/>
    </style:style>
    <style:style style:name="co9" style:family="table-column">
      <style:table-column-properties fo:break-before="auto" style:column-width="3.81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5" table:default-cell-style-name="ce1"/>
        <table:table-column table:style-name="co9" table:default-cell-style-name="ce1"/>
        <table:table-column table:style-name="co6" table:number-columns-repeated="16369" table:default-cell-style-name="ce1"/>
        <table:table-row table:style-name="ro1">
          <table:table-cell office:value-type="string" table:style-name="ce2">
            <text:p>Option 1: Parralel beam</text:p>
          </table:table-cell>
          <table:table-cell table:number-columns-repeated="5" table:style-name="ce2"/>
          <table:table-cell office:value-type="string" table:style-name="ce2">
            <text:p>Setup</text:p>
          </table:table-cell>
          <table:table-cell table:number-columns-repeated="7" table:style-name="ce2"/>
          <table:table-cell office:value-type="string" table:style-name="ce2">
            <text:p>Measurements</text:p>
          </table:table-cell>
          <table:table-cell table:number-columns-repeated="16369" table:style-name="ce2"/>
        </table:table-row>
        <table:table-row table:style-name="ro2">
          <table:table-cell table:number-columns-repeated="6" table:style-name="ce2"/>
          <table:table-cell office:value-type="string" table:style-name="ce2">
            <text:p>3<text:span text:style-name="T2">rd</text:span><text:s/>run</text:p>
          </table:table-cell>
          <table:table-cell table:number-columns-repeated="7" table:style-name="ce2"/>
          <table:table-cell office:value-type="string" table:style-name="ce2">
            <text:p>Lens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43.14" table:style-name="ce2">
            <text:p>43.14</text:p>
          </table:table-cell>
          <table:table-cell table:number-columns-repeated="4" table:style-name="ce2"/>
          <table:table-cell office:value-type="string" table:style-name="ce2">
            <text:p>Tower</text:p>
          </table:table-cell>
          <table:table-cell table:style-name="ce2"/>
          <table:table-cell office:value-type="string" table:style-name="ce2">
            <text:p>Lens position</text:p>
          </table:table-cell>
          <table:table-cell office:value-type="float" office:value="0" table:style-name="ce2">
            <text:p>0</text:p>
          </table:table-cell>
          <table:table-cell table:number-columns-repeated="4" table:style-name="ce2"/>
          <table:table-cell office:value-type="string" table:style-name="ce2">
            <text:p>Thickness</text:p>
          </table:table-cell>
          <table:table-cell office:value-type="float" office:value="8.4" table:style-name="ce2">
            <text:p>8.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83.78" table:formula="of:=[.J5]-[.J4]" table:style-name="ce2">
            <text:p>83.78</text:p>
          </table:table-cell>
          <table:table-cell table:number-columns-repeated="4" table:style-name="ce2"/>
          <table:table-cell office:value-type="string" table:style-name="ce2">
            <text:p>Lens plate</text:p>
          </table:table-cell>
          <table:table-cell table:style-name="ce2"/>
          <table:table-cell office:value-type="string" table:style-name="ce2">
            <text:p>Mesh position</text:p>
          </table:table-cell>
          <table:table-cell office:value-type="float" office:value="43.14" table:formula="of:=[.P3]/2+[.P7]+4+9+[.H7]+[.P12]" table:style-name="ce2">
            <text:p>43.14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254" table:style-name="ce2">
            <text:p>0.254</text:p>
          </table:table-cell>
          <table:table-cell table:number-columns-repeated="4" table:style-name="ce2"/>
          <table:table-cell office:value-type="string" table:style-name="ce2">
            <text:p>4mm spacer</text:p>
          </table:table-cell>
          <table:table-cell table:style-name="ce2"/>
          <table:table-cell office:value-type="string" table:style-name="ce2">
            <text:p>Camera position</text:p>
          </table:table-cell>
          <table:table-cell office:value-type="float" office:value="126.92" table:formula="of:=[.J4]+[.P13]+82.64" table:style-name="ce2">
            <text:p>126.92</text:p>
          </table:table-cell>
          <table:table-cell table:number-columns-repeated="4" table:style-name="ce2"/>
          <table:table-cell office:value-type="string" table:style-name="ce2">
            <text:p>Lens plate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0.05" table:style-name="ce2">
            <text:p>0.05</text:p>
          </table:table-cell>
          <table:table-cell table:number-columns-repeated="4" table:style-name="ce2"/>
          <table:table-cell office:value-type="string" table:style-name="ce2">
            <text:p>9mm spacer</text:p>
          </table:table-cell>
          <table:table-cell table:style-name="ce2"/>
          <table:table-cell office:value-type="string" table:style-name="ce2">
            <text:p>Correction term</text:p>
          </table:table-cell>
          <table:table-cell office:value-type="float" office:value="0" table:style-name="ce2">
            <text:p>0</text:p>
          </table:table-cell>
          <table:table-cell table:number-columns-repeated="4" table:style-name="ce2"/>
          <table:table-cell office:value-type="string" table:style-name="ce2">
            <text:p>Thickness with lens</text:p>
          </table:table-cell>
          <table:table-cell office:value-type="float" office:value="9.24" table:style-name="ce2">
            <text:p>9.2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20400000000000001" table:formula="of:=[.B5]-[.B6]" table:style-name="ce2">
            <text:p>0.204</text:p>
          </table:table-cell>
          <table:table-cell table:number-columns-repeated="4" table:style-name="ce2"/>
          <table:table-cell office:value-type="string" table:style-name="ce2">
            <text:p>gap</text:p>
          </table:table-cell>
          <table:table-cell office:value-type="float" office:value="24.61" table:style-name="ce2">
            <text:p>24.61</text:p>
          </table:table-cell>
          <table:table-cell table:number-columns-repeated="6" table:style-name="ce2"/>
          <table:table-cell office:value-type="string" table:style-name="ce2">
            <text:p>Bottom thickness</text:p>
          </table:table-cell>
          <table:table-cell office:value-type="float" office:value="0.83999999999999986" table:formula="of:=[.P6]-[.P3]" table:style-name="ce2">
            <text:p>0.8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table:number-columns-repeated="4" table:style-name="ce2"/>
          <table:table-cell office:value-type="string" table:style-name="ce2">
            <text:p>grid plate</text:p>
          </table:table-cell>
          <table:table-cell table:style-name="ce2"/>
          <table:table-cell office:value-type="string" table:style-name="ce2">
            <text:p>Total available length</text:p>
          </table:table-cell>
          <table:table-cell office:value-type="float" office:value="228.4" table:style-name="ce2">
            <text:p>228.4</text:p>
          </table:table-cell>
          <table:table-cell table:number-columns-repeated="4" table:style-name="ce2"/>
          <table:table-cell office:value-type="string" table:style-name="ce2">
            <text:p>Plate thickness</text:p>
          </table:table-cell>
          <table:table-cell table:number-columns-repeated="16369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gap</text:p>
          </table:table-cell>
          <table:table-cell table:style-name="ce2"/>
          <table:table-cell office:value-type="string" table:style-name="ce2">
            <text:p>Polepiece to lens</text:p>
          </table:table-cell>
          <table:table-cell office:value-type="float" office:value="101.48" table:formula="of:=[.J8]-[.J5]+[.J6]" table:style-name="ce2">
            <text:p>101.4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table:style-name="ce3"/>
          <table:table-cell table:number-columns-repeated="4" table:style-name="ce2"/>
          <table:table-cell office:value-type="string" table:style-name="ce2">
            <text:p>detector</text:p>
          </table:table-cell>
          <table:table-cell table:number-columns-repeated="7" table:style-name="ce2"/>
          <table:table-cell office:value-type="string" table:style-name="ce2">
            <text:p>Grid plate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0.86319185188676695" table:formula="of:=[.C84]*1000" table:style-name="ce2">
            <text:p>0.863191852</text:p>
          </table:table-cell>
          <table:table-cell table:number-columns-repeated="12" table:style-name="ce2"/>
          <table:table-cell office:value-type="string" table:style-name="ce2">
            <text:p>Thickness</text:p>
          </table:table-cell>
          <table:table-cell office:value-type="float" office:value="1.63" table:style-name="ce2">
            <text:p>1.63</text:p>
          </table:table-cell>
          <table:table-cell table:number-columns-repeated="16368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Full stack length (top of plate)</text:p>
          </table:table-cell>
          <table:table-cell table:number-columns-repeated="7" table:style-name="ce2"/>
          <table:table-cell office:value-type="string" table:style-name="ce2">
            <text:p>Inset</text:p>
          </table:table-cell>
          <table:table-cell office:value-type="float" office:value="0.49" table:style-name="ce2">
            <text:p>0.49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4.2313326072880733" table:formula="of:=[.B11]/[.B7]" table:style-name="ce2">
            <text:p>4.231332607</text:p>
          </table:table-cell>
          <table:table-cell table:number-columns-repeated="4" table:style-name="ce2"/>
          <table:table-cell office:value-type="float" office:value="121.73" table:style-name="ce2">
            <text:p>121.73</text:p>
          </table:table-cell>
          <table:table-cell table:number-columns-repeated="7" table:style-name="ce2"/>
          <table:table-cell office:value-type="string" table:style-name="ce2">
            <text:p>Bottom thickness</text:p>
          </table:table-cell>
          <table:table-cell office:value-type="float" office:value="1.1399999999999999" table:formula="of:=[.P11]-[.P12]" table:style-name="ce2">
            <text:p>1.1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distance_to_focalplane (mm)</text:p>
          </table:table-cell>
          <table:table-cell office:value-type="float" office:value="25.927383585038363" table:formula="of:=[.B4]/([.B13]-1)" table:style-name="ce2">
            <text:p>25.92738359</text:p>
          </table:table-cell>
          <table:table-cell table:number-columns-repeated="4" table:style-name="ce2"/>
          <table:table-cell office:value-type="string" table:style-name="ce2">
            <text:p>top of grid to botto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focal length(mm)</text:p>
          </table:table-cell>
          <table:table-cell office:value-type="float" office:value="17.212616414961637" table:formula="of:=[.B3]-[.B14]" table:style-name="ce2">
            <text:p>17.21261641</text:p>
          </table:table-cell>
          <table:table-cell table:number-columns-repeated="4" table:style-name="ce2"/>
          <table:table-cell office:value-type="float" office:value="82.64" table:style-name="ce2">
            <text:p>82.64</text:p>
          </table:table-cell>
          <table:table-cell table:number-columns-repeated="16377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style-name="ro2">
          <table:table-cell office:value-type="string" table:style-name="ce2">
            <text:p>EXAMPLES WITH SIMULATED DATA</text:p>
          </table:table-cell>
          <table:table-cell table:number-columns-repeated="5" table:style-name="ce2"/>
          <table:table-cell office:value-type="string" table:style-name="ce2">
            <text:p>4<text:span text:style-name="T2">th</text:span><text:s/>run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string" table:style-name="ce2">
            <text:p>400 mesh</text:p>
          </table:table-cell>
          <table:table-cell office:value-type="string" table:style-name="ce2">
            <text:p>500 mesh</text:p>
          </table:table-cell>
          <table:table-cell office:value-type="string" table:style-name="ce2">
            <text:p>200 mesh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ower</text:p>
          </table:table-cell>
          <table:table-cell table:style-name="ce2"/>
          <table:table-cell office:value-type="string" table:style-name="ce2">
            <text:p>Mesh position</text:p>
          </table:table-cell>
          <table:table-cell office:value-type="float" office:value="0" table:style-name="ce2">
            <text:p>0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7.54" table:style-name="ce2">
            <text:p>17.54</text:p>
          </table:table-cell>
          <table:table-cell table:style-name="ce2"/>
          <table:table-cell office:value-type="string" table:style-name="ce2">
            <text:p>Grid plate</text:p>
          </table:table-cell>
          <table:table-cell table:style-name="ce2"/>
          <table:table-cell office:value-type="string" table:style-name="ce2">
            <text:p>Lens position</text:p>
          </table:table-cell>
          <table:table-cell office:value-type="float" office:value="10.48" table:formula="of:=[.P7]+9+4+[.P7]-4.2" table:style-name="ce2">
            <text:p>10.4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office:value-type="float" office:value="115" table:style-name="ce2">
            <text:p>115</text:p>
          </table:table-cell>
          <table:table-cell office:value-type="float" office:value="143.05000000000001" table:style-name="ce2">
            <text:p>143.05</text:p>
          </table:table-cell>
          <table:table-cell table:style-name="ce2"/>
          <table:table-cell office:value-type="string" table:style-name="ce2">
            <text:p>9mm spacer</text:p>
          </table:table-cell>
          <table:table-cell table:style-name="ce2"/>
          <table:table-cell office:value-type="string" table:style-name="ce2">
            <text:p>Camera position</text:p>
          </table:table-cell>
          <table:table-cell office:value-type="float" office:value="131.28" table:formula="of:=[.G29]+4" table:style-name="ce2">
            <text:p>131.2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6.4000000000000001E-2" table:style-name="ce2">
            <text:p>0.064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0.127" table:style-name="ce2">
            <text:p>0.127</text:p>
          </table:table-cell>
          <table:table-cell office:value-type="float" office:value="0.254" table:style-name="ce2">
            <text:p>0.254</text:p>
          </table:table-cell>
          <table:table-cell table:style-name="ce2"/>
          <table:table-cell office:value-type="string" table:style-name="ce2">
            <text:p>4mm spac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2.3E-2" table:style-name="ce2">
            <text:p>0.023</text:p>
          </table:table-cell>
          <table:table-cell office:value-type="float" office:value="2.3E-2" table:style-name="ce2">
            <text:p>0.023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0.05" table:style-name="ce2">
            <text:p>0.05</text:p>
          </table:table-cell>
          <table:table-cell table:style-name="ce2"/>
          <table:table-cell office:value-type="string" table:style-name="ce2">
            <text:p>gap</text:p>
          </table:table-cell>
          <table:table-cell office:value-type="float" office:value="8.89" table:style-name="ce2">
            <text:p>8.89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4.1000000000000002E-2" table:formula="of:=[.B22]-[.B23]" table:style-name="ce2">
            <text:p>0.041</text:p>
          </table:table-cell>
          <table:table-cell office:value-type="float" office:value="2.7999999999999997E-2" table:formula="of:=[.C22]-[.C23]" table:style-name="ce2">
            <text:p>0.028</text:p>
          </table:table-cell>
          <table:table-cell office:value-type="float" office:value="0.10100000000000001" table:formula="of:=[.D22]-[.D23]" table:style-name="ce2">
            <text:p>0.101</text:p>
          </table:table-cell>
          <table:table-cell office:value-type="float" office:value="0.20400000000000001" table:formula="of:=[.E22]-[.E23]" table:style-name="ce2">
            <text:p>0.204</text:p>
          </table:table-cell>
          <table:table-cell table:style-name="ce2"/>
          <table:table-cell office:value-type="string" table:style-name="ce2">
            <text:p>Lens plat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table:style-name="ce2"/>
          <table:table-cell office:value-type="string" table:style-name="ce2">
            <text:p>gap</text:p>
          </table:table-cell>
          <table:table-cell table:number-columns-repeated="16377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detecto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office:value-type="float" office:value="56" table:style-name="ce3">
            <text:p>56</text:p>
          </table:table-cell>
          <table:table-cell office:value-type="float" office:value="38" table:style-name="ce3">
            <text:p>38</text:p>
          </table:table-cell>
          <table:table-cell office:value-type="float" office:value="35" table:style-name="ce3">
            <text:p>35</text:p>
          </table:table-cell>
          <table:table-cell office:value-type="float" office:value="63" table:style-name="ce3">
            <text:p>63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3.08" table:formula="of:=[.B27]*[.B25]" table:style-name="ce2">
            <text:p>3.08</text:p>
          </table:table-cell>
          <table:table-cell office:value-type="float" office:value="2.09" table:formula="of:=[.C27]*[.C25]" table:style-name="ce2">
            <text:p>2.09</text:p>
          </table:table-cell>
          <table:table-cell office:value-type="float" office:value="1.925" table:formula="of:=[.D27]*[.D25]" table:style-name="ce2">
            <text:p>1.925</text:p>
          </table:table-cell>
          <table:table-cell office:value-type="float" office:value="3.4649999999999999" table:formula="of:=[.E27]*[.E25]" table:style-name="ce2">
            <text:p>3.465</text:p>
          </table:table-cell>
          <table:table-cell table:style-name="ce2"/>
          <table:table-cell office:value-type="string" table:style-name="ce2">
            <text:p>Full stack length (top of plate)</text:p>
          </table:table-cell>
          <table:table-cell table:number-columns-repeated="16377" table:style-name="ce2"/>
        </table:table-row>
        <table:table-row table:style-name="ro1">
          <table:table-cell table:number-columns-repeated="6" table:style-name="ce2"/>
          <table:table-cell office:value-type="float" office:value="127.28" table:style-name="ce2">
            <text:p>127.28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75.121951219512198" table:formula="of:=[.B28]/[.B24]" table:style-name="ce2">
            <text:p>75.12195122</text:p>
          </table:table-cell>
          <table:table-cell office:value-type="float" office:value="74.642857142857139" table:formula="of:=[.C28]/[.C24]" table:style-name="ce2">
            <text:p>74.64285714</text:p>
          </table:table-cell>
          <table:table-cell office:value-type="float" office:value="19.059405940594058" table:formula="of:=[.D28]/[.D24]" table:style-name="ce2">
            <text:p>19.05940594</text:p>
          </table:table-cell>
          <table:table-cell office:value-type="float" office:value="16.985294117647058" table:formula="of:=[.E28]/[.E24]" table:style-name="ce2">
            <text:p>16.98529412</text:p>
          </table:table-cell>
          <table:table-cell table:style-name="ce2"/>
          <table:table-cell office:value-type="string" table:style-name="ce2">
            <text:p>top of lens plate to botto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distance_to_focalplane (mm)</text:p>
          </table:table-cell>
          <table:table-cell office:value-type="float" office:value="1.4840408028956893" table:formula="of:=[.B21]/([.B30]-1)" table:style-name="ce2">
            <text:p>1.484040803</text:p>
          </table:table-cell>
          <table:table-cell office:value-type="float" office:value="1.4936954413191077" table:formula="of:=[.C21]/([.C30]-1)" table:style-name="ce2">
            <text:p>1.493695441</text:p>
          </table:table-cell>
          <table:table-cell office:value-type="float" office:value="6.3678728070175445" table:formula="of:=[.D21]/([.D30]-1)" table:style-name="ce2">
            <text:p>6.367872807</text:p>
          </table:table-cell>
          <table:table-cell office:value-type="float" office:value="8.9488500459981619" table:formula="of:=[.E21]/([.E30]-1)" table:style-name="ce2">
            <text:p>8.948850046</text:p>
          </table:table-cell>
          <table:table-cell table:style-name="ce2"/>
          <table:table-cell office:value-type="float" office:value="104.03" table:style-name="ce2">
            <text:p>104.0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focal length(mm)</text:p>
          </table:table-cell>
          <table:table-cell office:value-type="float" office:value="8.5159591971043103" table:formula="of:=[.B20]-[.B31]" table:style-name="ce2">
            <text:p>8.515959197</text:p>
          </table:table-cell>
          <table:table-cell office:value-type="float" office:value="8.5063045586808919" table:formula="of:=[.C20]-[.C31]" table:style-name="ce2">
            <text:p>8.506304559</text:p>
          </table:table-cell>
          <table:table-cell office:value-type="float" office:value="8.6321271929824555" table:formula="of:=[.D20]-[.D31]" table:style-name="ce2">
            <text:p>8.632127193</text:p>
          </table:table-cell>
          <table:table-cell office:value-type="float" office:value="8.5911499540018372" table:formula="of:=[.E20]-[.E31]" table:style-name="ce2">
            <text:p>8.591149954</text:p>
          </table:table-cell>
          <table:table-cell table:number-columns-repeated="16379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Option 2: Point source</text:p>
          </table:table-cell>
          <table:table-cell table:number-columns-repeated="16383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Working distance</text:p>
          </table:table-cell>
          <table:table-cell office:value-type="float" office:value="75" table:style-name="ce2">
            <text:p>75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pointsource_to_lens (mm)</text:p>
          </table:table-cell>
          <table:table-cell office:value-type="float" office:value="26.480000000000004" table:formula="of:=[.J9]-[.B37]" table:style-name="ce2">
            <text:p>26.48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43.14" table:formula="of:=[.J4]" table:style-name="ce2">
            <text:p>43.1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83.78" table:formula="of:=[.J5]-[.J4]" table:style-name="ce2">
            <text:p>83.78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254" table:style-name="ce2">
            <text:p>0.25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0.05" table:style-name="ce2">
            <text:p>0.0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20400000000000001" table:formula="of:=[.B42]-[.B43]" table:style-name="ce2">
            <text:p>0.20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table:style-name="ce3"/>
          <table:table-cell office:value-type="string" table:style-name="ce2">
            <text:p>REMOVED FORMULA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0.89411297192116601" table:formula="of:=[.C89]*1000" table:style-name="ce1">
            <text:p>0.894112972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4.382906725103755" table:formula="of:=[.B48]/[.B44]" table:style-name="ce2">
            <text:p>4.38290672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istance_to_imageplane (mm)</text:p>
          </table:table-cell>
          <table:table-cell office:value-type="float" office:value="24.765684308789339" table:formula="of:=[.B41]/([.B50]-1)" table:style-name="ce2">
            <text:p>24.76568431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lens_to_imageplane (mm)</text:p>
          </table:table-cell>
          <table:table-cell office:value-type="float" office:value="18.374315691210661" table:formula="of:=[.B40]-[.B51]" table:style-name="ce2">
            <text:p>18.37431569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focal length (mm)</text:p>
          </table:table-cell>
          <table:table-cell office:value-type="float" office:value="10.847381617697929" table:formula="of:=[.B52]*[.B39]/([.B52]+[.B39])" table:style-name="ce2">
            <text:p>10.84738162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EXAMPLES WITH SIMULATED DATA</text:p>
          </table:table-cell>
          <table:table-cell table:number-columns-repeated="16383" table:style-name="ce2"/>
        </table:table-row>
        <table:table-row table:style-name="ro1">
          <table:table-cell table:style-name="ce2"/>
          <table:table-cell office:value-type="string" table:style-name="ce2">
            <text:p>200 mesh</text:p>
          </table:table-cell>
          <table:table-cell office:value-type="string" table:style-name="ce2">
            <text:p>300 mesh</text:p>
          </table:table-cell>
          <table:table-cell office:value-type="string" table:style-name="ce2">
            <text:p>500 mesh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pointsource_to_lens (mm)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90" table:style-name="ce2">
            <text:p>90</text:p>
          </table:table-cell>
          <table:table-cell office:value-type="float" office:value="140" table:style-name="ce2">
            <text:p>140</text:p>
          </table:table-cell>
          <table:table-cell office:value-type="float" office:value="145" table:style-name="ce2">
            <text:p>145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127" table:style-name="ce2">
            <text:p>0.127</text:p>
          </table:table-cell>
          <table:table-cell office:value-type="float" office:value="8.5000000000000006E-2" table:style-name="ce2">
            <text:p>0.085</text:p>
          </table:table-cell>
          <table:table-cell office:value-type="float" office:value="5.0999999999999997E-2" table:style-name="ce2">
            <text:p>0.051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2.5000000000000001E-2" table:style-name="ce2">
            <text:p>0.025</text:p>
          </table:table-cell>
          <table:table-cell office:value-type="float" office:value="2.3E-2" table:style-name="ce2">
            <text:p>0.023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10100000000000001" table:formula="of:=[.B60]-[.B61]" table:style-name="ce2">
            <text:p>0.101</text:p>
          </table:table-cell>
          <table:table-cell office:value-type="float" office:value="6.0000000000000005E-2" table:formula="of:=[.C60]-[.C61]" table:style-name="ce2">
            <text:p>0.06</text:p>
          </table:table-cell>
          <table:table-cell office:value-type="float" office:value="2.7999999999999997E-2" table:formula="of:=[.D60]-[.D61]" table:style-name="ce2">
            <text:p>0.028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office:value-type="float" office:value="34" table:style-name="ce3">
            <text:p>34</text:p>
          </table:table-cell>
          <table:table-cell office:value-type="float" office:value="31" table:style-name="ce3">
            <text:p>31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1.87" table:formula="of:=[.B65]*[.B63]" table:style-name="ce2">
            <text:p>1.87</text:p>
          </table:table-cell>
          <table:table-cell office:value-type="float" office:value="1.7050000000000001" table:formula="of:=[.C65]*[.C63]" table:style-name="ce2">
            <text:p>1.705</text:p>
          </table:table-cell>
          <table:table-cell office:value-type="float" office:value="5.5" table:formula="of:=[.D65]*[.D63]" table:style-name="ce2">
            <text:p>5.5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18.514851485148515" table:formula="of:=[.B66]/[.B62]" table:style-name="ce2">
            <text:p>18.51485149</text:p>
          </table:table-cell>
          <table:table-cell office:value-type="float" office:value="28.416666666666664" table:formula="of:=[.C66]/[.C62]" table:style-name="ce2">
            <text:p>28.41666667</text:p>
          </table:table-cell>
          <table:table-cell office:value-type="float" office:value="196.42857142857144" table:formula="of:=[.D66]/[.D62]" table:style-name="ce2">
            <text:p>196.4285714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istance_to_imageplane (mm)</text:p>
          </table:table-cell>
          <table:table-cell office:value-type="float" office:value="5.1384963256076874" table:formula="of:=[.B59]/([.B68]-1)" table:style-name="ce2">
            <text:p>5.138496326</text:p>
          </table:table-cell>
          <table:table-cell office:value-type="float" office:value="5.1063829787234045" table:formula="of:=[.C59]/([.C68]-1)" table:style-name="ce2">
            <text:p>5.106382979</text:p>
          </table:table-cell>
          <table:table-cell office:value-type="float" office:value="0.74195906432748537" table:formula="of:=[.D59]/([.D68]-1)" table:style-name="ce2">
            <text:p>0.74195906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lens_to_imageplane (mm)</text:p>
          </table:table-cell>
          <table:table-cell office:value-type="float" office:value="14.861503674392313" table:formula="of:=[.B58]-[.B69]" table:style-name="ce2">
            <text:p>14.86150367</text:p>
          </table:table-cell>
          <table:table-cell office:value-type="float" office:value="14.893617021276595" table:formula="of:=[.C58]-[.C69]" table:style-name="ce2">
            <text:p>14.89361702</text:p>
          </table:table-cell>
          <table:table-cell office:value-type="float" office:value="19.258040935672515" table:formula="of:=[.D58]-[.D69]" table:style-name="ce2">
            <text:p>19.2580409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cal length (mm)</text:p>
          </table:table-cell>
          <table:table-cell office:value-type="float" office:value="8.5260256202367444" table:formula="of:=[.B70]*[.B57]/([.B70]+[.B57])" table:style-name="ce2">
            <text:p>8.52602562</text:p>
          </table:table-cell>
          <table:table-cell office:value-type="float" office:value="8.5365853658536572" table:formula="of:=[.C70]*[.C57]/([.C70]+[.C57])" table:style-name="ce2">
            <text:p>8.536585366</text:p>
          </table:table-cell>
          <table:table-cell office:value-type="float" office:value="8.4321988690920744" table:formula="of:=[.D70]*[.D57]/([.D70]+[.D57])" table:style-name="ce2">
            <text:p>8.432198869</text:p>
          </table:table-cell>
          <table:table-cell table:number-columns-repeated="16380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">
            <text:p>Resolution shadows</text:p>
          </table:table-cell>
          <table:table-cell office:value-type="string" table:style-name="ce1">
            <text:p>Working Distance</text:p>
          </table:table-cell>
          <table:table-cell office:value-type="string" table:style-name="ce1">
            <text:p>gap distance (m)</text:p>
          </table:table-cell>
          <table:table-cell office:value-type="string" table:style-name="ce1">
            <text:p>stderror (m)</text:p>
          </table:table-cell>
          <table:table-cell office:value-type="string" table:style-name="ce1">
            <text:p>Focal length(mm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4.2701603043439102E-4" table:style-name="ce1">
            <text:p>0.000427016</text:p>
          </table:table-cell>
          <table:table-cell office:value-type="float" office:value="9.5161558663267593E-6" table:style-name="ce4">
            <text:p>9.52E-06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5.1031643688332197E-4" table:style-name="ce1">
            <text:p>0.000510316</text:p>
          </table:table-cell>
          <table:table-cell office:value-type="float" office:value="2.0476979474055301E-5" table:style-name="ce4">
            <text:p>2.05E-05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.9354032641543005E-4" table:style-name="ce1">
            <text:p>0.00049354</text:p>
          </table:table-cell>
          <table:table-cell office:value-type="float" office:value="1.42915207469048E-5" table:style-name="ce4">
            <text:p>1.43E-05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5.2398795150005795E-4" table:style-name="ce1">
            <text:p>0.000523988</text:p>
          </table:table-cell>
          <table:table-cell office:value-type="float" office:value="6.3284483070371698E-6" table:style-name="ce4">
            <text:p>6.33E-06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5.4265300028312697E-4" table:style-name="ce1">
            <text:p>0.000542653</text:p>
          </table:table-cell>
          <table:table-cell office:value-type="float" office:value="5.2606940138437097E-6" table:style-name="ce4">
            <text:p>5.26E-06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8.7129160818605995E-4" table:style-name="ce1">
            <text:p>0.000871292</text:p>
          </table:table-cell>
          <table:table-cell office:value-type="float" office:value="1.32418724502264E-5" table:style-name="ce4">
            <text:p>1.32E-05</text:p>
          </table:table-cell>
          <table:table-cell office:value-type="float" office:value="17.52732963170352" table:style-name="ce1">
            <text:p>17.52732963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Overview shadows</text:p>
          </table:table-cell>
          <table:table-cell office:value-type="string" table:style-name="ce1">
            <text:p>Working Distance</text:p>
          </table:table-cell>
          <table:table-cell office:value-type="string" table:style-name="ce1">
            <text:p>measured gap distance (m)</text:p>
          </table:table-cell>
          <table:table-cell office:value-type="string" table:style-name="ce1">
            <text:p>stderror (m)</text:p>
          </table:table-cell>
          <table:table-cell office:value-type="string" table:style-name="ce1">
            <text:p>calculated focal length (mm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270 (parallel)</text:p>
          </table:table-cell>
          <table:table-cell office:value-type="float" office:value="8.6319185188676699E-4" table:style-name="ce1">
            <text:p>0.000863192</text:p>
          </table:table-cell>
          <table:table-cell office:value-type="float" office:value="1.00227825556606E-5" table:style-name="ce4">
            <text:p>1.00E-05</text:p>
          </table:table-cell>
          <table:table-cell office:value-type="float" office:value="17.212616414961637" table:style-name="ce1">
            <text:p>17.21261641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.7300824113510595E-4" table:style-name="ce1">
            <text:p>0.000973008</text:p>
          </table:table-cell>
          <table:table-cell office:value-type="float" office:value="1.9106340405498199E-5" table:style-name="ce4">
            <text:p>1.91E-05</text:p>
          </table:table-cell>
          <table:table-cell office:value-type="float" office:value="17.023112556158924" table:style-name="ce1">
            <text:p>17.02311256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.7855244024918492E-4" table:style-name="ce1">
            <text:p>0.000978552</text:p>
          </table:table-cell>
          <table:table-cell office:value-type="float" office:value="3.6179419094112699E-5" table:style-name="ce4">
            <text:p>3.62E-05</text:p>
          </table:table-cell>
          <table:table-cell office:value-type="float" office:value="13.974406017036939" table:style-name="ce1">
            <text:p>13.97440602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.7020097007636901E-4" table:style-name="ce1">
            <text:p>0.000970201</text:p>
          </table:table-cell>
          <table:table-cell office:value-type="float" office:value="2.3085314932016799E-5" table:style-name="ce4">
            <text:p>2.31E-05</text:p>
          </table:table-cell>
          <table:table-cell office:value-type="float" office:value="13.260582260821371" table:style-name="ce1">
            <text:p>13.26058226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9.1274591740251405E-4" table:style-name="ce1">
            <text:p>0.000912746</text:p>
          </table:table-cell>
          <table:table-cell office:value-type="float" office:value="1.9592918530021701E-5" table:style-name="ce4">
            <text:p>1.96E-05</text:p>
          </table:table-cell>
          <table:table-cell office:value-type="float" office:value="11.858528217553985" table:style-name="ce1">
            <text:p>11.85852822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8.9411297192116602E-4" table:style-name="ce1">
            <text:p>0.000894113</text:p>
          </table:table-cell>
          <table:table-cell office:value-type="float" office:value="1.81234036675559E-5" table:style-name="ce4">
            <text:p>1.81E-05</text:p>
          </table:table-cell>
          <table:table-cell office:value-type="float" office:value="10.847381617697929" table:style-name="ce1">
            <text:p>10.84738162</text:p>
          </table:table-cell>
          <table:table-cell table:number-columns-repeated="16379"/>
        </table:table-row>
        <table:table-row table:number-rows-repeated="104848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Aptos Narrow" style:font-name-asian="Aptos Narrow" style:font-name-complex="Aptos Narrow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/>
      <style:text-properties fo:color="#808080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Aptos Narrow" style:font-name-asian="Aptos Narrow" style:font-name-complex="Aptos Narrow" fo:font-size="11pt" style:font-size-asian="11pt" style:font-size-complex="11pt" style:font-family-generic="swiss"/>
    </style:style>
    <style:style style:name="Heading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2pt" style:font-size-asian="12pt" style:font-size-complex="12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/>
      <style:text-properties fo:color="#0000EE" style:font-name="Aptos Narrow" style:font-name-asian="Aptos Narrow" style:font-name-complex="Aptos Narrow" fo:font-size="11pt" style:font-size-asian="11pt" style:font-size-complex="11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Aptos Narrow" style:font-name-asian="Aptos Narrow" style:font-name-complex="Aptos Narrow" fo:font-size="11pt" style:font-size-asian="11pt" style:font-size-complex="11pt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Aptos Narrow" style:font-name-asian="Aptos Narrow" style:font-name-complex="Aptos Narrow" fo:font-size="11pt" style:font-size-asian="11pt" style:font-size-complex="11pt" style:font-family-generic="swiss"/>
    </style:style>
    <style:style style:name="Result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Text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/>
      <style:text-properties fo:color="#CC0000" style:font-name="Aptos Narrow" style:font-name-asian="Aptos Narrow" style:font-name-complex="Aptos Narrow" fo:font-size="11pt" style:font-size-asian="11pt" style:font-size-complex="11pt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Des De Borger</meta:initial-creator>
    <dc:creator>Des De Borger</dc:creator>
    <meta:creation-date>2026-03-31T08:36:37Z</meta:creation-date>
    <dc:date>2026-04-09T07:19:27Z</dc:date>
    <meta:editing-cycles>2</meta:editing-cycles>
    <meta:editing-duration>PT6710S</meta:editing-duration>
    <meta:user-defined meta:name="AppVersion">16.0300</meta:user-defined>
  </office:meta>
</office:document-meta>
</file>