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5665in"/>
    </style:style>
    <style:style style:name="co5" style:family="table-column">
      <style:table-column-properties fo:break-before="auto" style:column-width="1.8252in"/>
    </style:style>
    <style:style style:name="co6" style:family="table-column">
      <style:table-column-properties fo:break-before="auto" style:column-width="1.7835in"/>
    </style:style>
    <style:style style:name="co7" style:family="table-column">
      <style:table-column-properties fo:break-before="auto" style:column-width="1.55in"/>
    </style:style>
    <style:style style:name="co8" style:family="table-column">
      <style:table-column-properties fo:break-before="auto" style:column-width="1.45in"/>
    </style:style>
    <style:style style:name="co9" style:family="table-column">
      <style:table-column-properties fo:break-before="auto" style:column-width="2.0583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</style:style>
    <style:style style:name="ce4" style:family="table-cell" style:parent-style-name="Default" style:data-style-name="N81"/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fo:color="#ff0000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6369" table:default-cell-style-name="ce1"/>
        <table:table-row table:style-name="ro1">
          <table:table-cell table:style-name="ce2" office:value-type="string" calcext:value-type="string">
            <text:p>Option 1: Parralel beam</text:p>
          </table:table-cell>
          <table:table-cell table:style-name="ce2" table:number-columns-repeated="5"/>
          <table:table-cell table:style-name="ce2" office:value-type="string" calcext:value-type="string">
            <text:p>Setup</text:p>
          </table:table-cell>
          <table:table-cell table:style-name="ce2" table:number-columns-repeated="7"/>
          <table:table-cell table:style-name="ce2" office:value-type="string" calcext:value-type="string">
            <text:p>Measurements</text:p>
          </table:table-cell>
          <table:table-cell table:style-name="ce2" table:number-columns-repeated="16369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3<text:span text:style-name="T1">rd</text:span> run</text:p>
          </table:table-cell>
          <table:table-cell table:style-name="ce2" table:number-columns-repeated="2"/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abs</text:p>
          </table:table-cell>
          <table:table-cell table:style-name="ce2" table:number-columns-repeated="3"/>
          <table:table-cell table:style-name="ce2" office:value-type="string" calcext:value-type="string">
            <text:p>Lens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style-name="ce2" office:value-type="float" office:value="43.14" calcext:value-type="float">
            <text:p>43.14</text:p>
          </table:table-cell>
          <table:table-cell table:style-name="ce2" table:number-columns-repeated="4"/>
          <table:table-cell table:style-name="ce2" office:value-type="string" calcext:value-type="string">
            <text:p>Tower</text:p>
          </table:table-cell>
          <table:table-cell table:style-name="ce2"/>
          <table:table-cell table:style-name="ce2" office:value-type="string" calcext:value-type="string">
            <text:p>Lens positio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K5]-[.J5]" office:value-type="float" office:value="101.08" calcext:value-type="float">
            <text:p>101.08</text:p>
          </table:table-cell>
          <table:table-cell table:style-name="ce2" table:number-columns-repeated="3"/>
          <table:table-cell table:style-name="ce2" office:value-type="string" calcext:value-type="string">
            <text:p>Thickness</text:p>
          </table:table-cell>
          <table:table-cell table:style-name="ce2" office:value-type="float" office:value="8.4" calcext:value-type="float">
            <text:p>8.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table:formula="of:=[.J5]-[.J4]" office:value-type="float" office:value="83.78" calcext:value-type="float">
            <text:p>83.78</text:p>
          </table:table-cell>
          <table:table-cell table:style-name="ce2" table:number-columns-repeated="4"/>
          <table:table-cell table:style-name="ce2" office:value-type="string" calcext:value-type="string">
            <text:p>Lens plate</text:p>
          </table:table-cell>
          <table:table-cell table:style-name="ce2"/>
          <table:table-cell table:style-name="ce2" office:value-type="string" calcext:value-type="string">
            <text:p>Mesh position</text:p>
          </table:table-cell>
          <table:table-cell table:style-name="ce2" table:formula="of:=[.P3]/2+[.P7]+4+9+[.H7]+[.P12]" office:value-type="float" office:value="43.14" calcext:value-type="float">
            <text:p>43.14</text:p>
          </table:table-cell>
          <table:table-cell table:style-name="ce2" table:formula="of:=[.J4]-[.J5]+[.K5]" office:value-type="float" office:value="144.22" calcext:value-type="float">
            <text:p>144.22</text:p>
          </table:table-cell>
          <table:table-cell table:style-name="ce2" table:number-columns-repeated="16373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table:number-columns-repeated="4"/>
          <table:table-cell table:style-name="ce2" office:value-type="string" calcext:value-type="string">
            <text:p>4mm spacer</text:p>
          </table:table-cell>
          <table:table-cell table:style-name="ce2"/>
          <table:table-cell table:style-name="ce2" office:value-type="string" calcext:value-type="string">
            <text:p>Camera position</text:p>
          </table:table-cell>
          <table:table-cell table:style-name="ce2" table:formula="of:=[.J4]+[.P13]+82.64" office:value-type="float" office:value="126.92" calcext:value-type="float">
            <text:p>126.92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number-columns-repeated="3"/>
          <table:table-cell table:style-name="ce2" office:value-type="string" calcext:value-type="string">
            <text:p>Lens plate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4"/>
          <table:table-cell table:style-name="ce2" office:value-type="string" calcext:value-type="string">
            <text:p>9mm spacer</text:p>
          </table:table-cell>
          <table:table-cell table:style-name="ce2"/>
          <table:table-cell table:style-name="ce2" office:value-type="string" calcext:value-type="string">
            <text:p>Correction ter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string" calcext:value-type="string">
            <text:p>Thickness with lens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5]-[.B6]" office:value-type="float" office:value="0.204" calcext:value-type="float">
            <text:p>0.204</text:p>
          </table:table-cell>
          <table:table-cell table:style-name="ce2" table:number-columns-repeated="4"/>
          <table:table-cell table:style-name="ce2" office:value-type="string" calcext:value-type="string">
            <text:p>gap</text:p>
          </table:table-cell>
          <table:table-cell table:style-name="ce2" office:value-type="float" office:value="24.61" calcext:value-type="float">
            <text:p>24.61</text:p>
          </table:table-cell>
          <table:table-cell table:style-name="ce2" table:number-columns-repeated="6"/>
          <table:table-cell table:style-name="ce2" office:value-type="string" calcext:value-type="string">
            <text:p>Bottom thickness</text:p>
          </table:table-cell>
          <table:table-cell table:style-name="ce2" table:formula="of:=[.P6]-[.P3]" office:value-type="float" office:value="0.84" calcext:value-type="float">
            <text:p>0.8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table:number-columns-repeated="4"/>
          <table:table-cell table:style-name="ce2" office:value-type="string" calcext:value-type="string">
            <text:p>grid plate</text:p>
          </table:table-cell>
          <table:table-cell table:style-name="ce2"/>
          <table:table-cell table:style-name="ce2" office:value-type="string" calcext:value-type="string">
            <text:p>Total available length</text:p>
          </table:table-cell>
          <table:table-cell table:style-name="ce2" office:value-type="float" office:value="228.4" calcext:value-type="float">
            <text:p>228.4</text:p>
          </table:table-cell>
          <table:table-cell table:style-name="ce2" table:number-columns-repeated="4"/>
          <table:table-cell table:style-name="ce2" office:value-type="string" calcext:value-type="string">
            <text:p>Plate thickness</text:p>
          </table:table-cell>
          <table:table-cell table:style-name="ce2" table:number-columns-repeated="16369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gap</text:p>
          </table:table-cell>
          <table:table-cell table:style-name="ce2"/>
          <table:table-cell table:style-name="ce2" office:value-type="string" calcext:value-type="string">
            <text:p>Polepiece to lens</text:p>
          </table:table-cell>
          <table:table-cell table:style-name="ce2" table:formula="of:=[.J8]-[.J5]+[.J6]" office:value-type="float" office:value="101.48" calcext:value-type="float">
            <text:p>101.4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/>
          <table:table-cell table:style-name="ce2" table:number-columns-repeated="4"/>
          <table:table-cell table:style-name="ce2" office:value-type="string" calcext:value-type="string">
            <text:p>detector</text:p>
          </table:table-cell>
          <table:table-cell table:style-name="ce2" table:number-columns-repeated="7"/>
          <table:table-cell table:style-name="ce2" office:value-type="string" calcext:value-type="string">
            <text:p>Grid plate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C126]*1000" office:value-type="float" office:value="0.863191851886767" calcext:value-type="float">
            <text:p>0.863191851886767</text:p>
          </table:table-cell>
          <table:table-cell table:style-name="ce2" table:number-columns-repeated="12"/>
          <table:table-cell table:style-name="ce2" office:value-type="string" calcext:value-type="string">
            <text:p>Thickness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table:number-columns-repeated="16368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Full stack length (top of plate)</text:p>
          </table:table-cell>
          <table:table-cell table:style-name="ce2" table:number-columns-repeated="7"/>
          <table:table-cell table:style-name="ce2" office:value-type="string" calcext:value-type="string">
            <text:p>Inset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11]/[.B7]" office:value-type="float" office:value="4.23133260728807" calcext:value-type="float">
            <text:p>4.23133260728807</text:p>
          </table:table-cell>
          <table:table-cell table:style-name="ce2" table:number-columns-repeated="4"/>
          <table:table-cell table:style-name="ce2" office:value-type="float" office:value="121.73" calcext:value-type="float">
            <text:p>121.73</text:p>
          </table:table-cell>
          <table:table-cell table:style-name="ce2" table:number-columns-repeated="7"/>
          <table:table-cell table:style-name="ce2" office:value-type="string" calcext:value-type="string">
            <text:p>Bottom thickness</text:p>
          </table:table-cell>
          <table:table-cell table:style-name="ce2" table:formula="of:=[.P11]-[.P12]" office:value-type="float" office:value="1.14" calcext:value-type="float">
            <text:p>1.1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distance_to_focalplane (mm)</text:p>
          </table:table-cell>
          <table:table-cell table:style-name="ce2" table:formula="of:=[.B4]/([.B13]-1)" office:value-type="float" office:value="25.9273835850384" calcext:value-type="float">
            <text:p>25.9273835850384</text:p>
          </table:table-cell>
          <table:table-cell table:style-name="ce2" table:number-columns-repeated="4"/>
          <table:table-cell table:style-name="ce2" office:value-type="string" calcext:value-type="string">
            <text:p>top of grid to bottom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focal length(mm)</text:p>
          </table:table-cell>
          <table:table-cell table:style-name="ce2" table:formula="of:=[.B3]-[.B14]" office:value-type="float" office:value="17.2126164149616" calcext:value-type="float">
            <text:p>17.2126164149616</text:p>
          </table:table-cell>
          <table:table-cell table:style-name="ce2" table:number-columns-repeated="4"/>
          <table:table-cell table:style-name="ce2" office:value-type="float" office:value="82.64" calcext:value-type="float">
            <text:p>82.64</text:p>
          </table:table-cell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EXAMPLES WITH SIMULATED DATA</text:p>
          </table:table-cell>
          <table:table-cell table:style-name="ce2" table:number-columns-repeated="5"/>
          <table:table-cell table:style-name="ce2" office:value-type="string" calcext:value-type="string">
            <text:p>4<text:span text:style-name="T1">th</text:span> run</text:p>
          </table:table-cell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400 mesh</text:p>
          </table:table-cell>
          <table:table-cell table:style-name="ce2" office:value-type="string" calcext:value-type="string">
            <text:p>500 mesh</text:p>
          </table:table-cell>
          <table:table-cell table:style-name="ce2" office:value-type="string" calcext:value-type="string">
            <text:p>200 me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Tower</text:p>
          </table:table-cell>
          <table:table-cell table:style-name="ce2"/>
          <table:table-cell table:style-name="ce2" office:value-type="string" calcext:value-type="string">
            <text:p>Mesh positio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/>
          <table:table-cell table:style-name="ce2" office:value-type="string" calcext:value-type="string">
            <text:p>Grid plate</text:p>
          </table:table-cell>
          <table:table-cell table:style-name="ce2"/>
          <table:table-cell table:style-name="ce2" office:value-type="string" calcext:value-type="string">
            <text:p>Lens position</text:p>
          </table:table-cell>
          <table:table-cell table:style-name="ce2" table:formula="of:=[.P7]+9+4+[.P7]-4.2" office:value-type="float" office:value="10.48" calcext:value-type="float">
            <text:p>10.4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3.05" calcext:value-type="float">
            <text:p>143.05</text:p>
          </table:table-cell>
          <table:table-cell table:style-name="ce2"/>
          <table:table-cell table:style-name="ce2" office:value-type="string" calcext:value-type="string">
            <text:p>9mm spacer</text:p>
          </table:table-cell>
          <table:table-cell table:style-name="ce2"/>
          <table:table-cell table:style-name="ce2" office:value-type="string" calcext:value-type="string">
            <text:p>Camera position</text:p>
          </table:table-cell>
          <table:table-cell table:style-name="ce2" table:formula="of:=[.G29]+4" office:value-type="float" office:value="131.28" calcext:value-type="float">
            <text:p>131.2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/>
          <table:table-cell table:style-name="ce2" office:value-type="string" calcext:value-type="string">
            <text:p>4mm spacer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number-columns-repeated="2" table:style-name="ce2" office:value-type="float" office:value="0.023" calcext:value-type="float">
            <text:p>0.02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/>
          <table:table-cell table:style-name="ce2" office:value-type="string" calcext:value-type="string">
            <text:p>gap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22]-[.B23]" office:value-type="float" office:value="0.041" calcext:value-type="float">
            <text:p>0.041</text:p>
          </table:table-cell>
          <table:table-cell table:style-name="ce2" table:formula="of:=[.C22]-[.C23]" office:value-type="float" office:value="0.028" calcext:value-type="float">
            <text:p>0.028</text:p>
          </table:table-cell>
          <table:table-cell table:style-name="ce2" table:formula="of:=[.D22]-[.D23]" office:value-type="float" office:value="0.101" calcext:value-type="float">
            <text:p>0.101</text:p>
          </table:table-cell>
          <table:table-cell table:style-name="ce2" table:formula="of:=[.E22]-[.E23]" office:value-type="float" office:value="0.204" calcext:value-type="float">
            <text:p>0.204</text:p>
          </table:table-cell>
          <table:table-cell table:style-name="ce2"/>
          <table:table-cell table:style-name="ce2" office:value-type="string" calcext:value-type="string">
            <text:p>Lens plate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number-columns-repeated="4" table:style-name="ce2" office:value-type="float" office:value="0.055" calcext:value-type="float">
            <text:p>0.055</text:p>
          </table:table-cell>
          <table:table-cell table:style-name="ce2"/>
          <table:table-cell table:style-name="ce2" office:value-type="string" calcext:value-type="string">
            <text:p>gap</text:p>
          </table:table-cell>
          <table:table-cell table:style-name="ce2" table:number-columns-repeated="16377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detector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B27]*[.B25]" office:value-type="float" office:value="3.08" calcext:value-type="float">
            <text:p>3.08</text:p>
          </table:table-cell>
          <table:table-cell table:style-name="ce2" table:formula="of:=[.C27]*[.C25]" office:value-type="float" office:value="2.09" calcext:value-type="float">
            <text:p>2.09</text:p>
          </table:table-cell>
          <table:table-cell table:style-name="ce2" table:formula="of:=[.D27]*[.D25]" office:value-type="float" office:value="1.925" calcext:value-type="float">
            <text:p>1.925</text:p>
          </table:table-cell>
          <table:table-cell table:style-name="ce2" table:formula="of:=[.E27]*[.E25]" office:value-type="float" office:value="3.465" calcext:value-type="float">
            <text:p>3.465</text:p>
          </table:table-cell>
          <table:table-cell table:style-name="ce2"/>
          <table:table-cell table:style-name="ce2" office:value-type="string" calcext:value-type="string">
            <text:p>Full stack length (top of plate)</text:p>
          </table:table-cell>
          <table:table-cell table:style-name="ce2" table:number-columns-repeated="16377"/>
        </table:table-row>
        <table:table-row table:style-name="ro1">
          <table:table-cell table:style-name="ce2" table:number-columns-repeated="6"/>
          <table:table-cell table:style-name="ce2" office:value-type="float" office:value="127.28" calcext:value-type="float">
            <text:p>127.28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28]/[.B24]" office:value-type="float" office:value="75.1219512195122" calcext:value-type="float">
            <text:p>75.1219512195122</text:p>
          </table:table-cell>
          <table:table-cell table:style-name="ce2" table:formula="of:=[.C28]/[.C24]" office:value-type="float" office:value="74.6428571428571" calcext:value-type="float">
            <text:p>74.6428571428571</text:p>
          </table:table-cell>
          <table:table-cell table:style-name="ce2" table:formula="of:=[.D28]/[.D24]" office:value-type="float" office:value="19.0594059405941" calcext:value-type="float">
            <text:p>19.0594059405941</text:p>
          </table:table-cell>
          <table:table-cell table:style-name="ce2" table:formula="of:=[.E28]/[.E24]" office:value-type="float" office:value="16.9852941176471" calcext:value-type="float">
            <text:p>16.9852941176471</text:p>
          </table:table-cell>
          <table:table-cell table:style-name="ce2"/>
          <table:table-cell table:style-name="ce2" office:value-type="string" calcext:value-type="string">
            <text:p>top of lens plate to bottom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istance_to_focalplane (mm)</text:p>
          </table:table-cell>
          <table:table-cell table:style-name="ce2" table:formula="of:=[.B21]/([.B30]-1)" office:value-type="float" office:value="1.48404080289569" calcext:value-type="float">
            <text:p>1.48404080289569</text:p>
          </table:table-cell>
          <table:table-cell table:style-name="ce2" table:formula="of:=[.C21]/([.C30]-1)" office:value-type="float" office:value="1.49369544131911" calcext:value-type="float">
            <text:p>1.49369544131911</text:p>
          </table:table-cell>
          <table:table-cell table:style-name="ce2" table:formula="of:=[.D21]/([.D30]-1)" office:value-type="float" office:value="6.36787280701754" calcext:value-type="float">
            <text:p>6.36787280701754</text:p>
          </table:table-cell>
          <table:table-cell table:style-name="ce2" table:formula="of:=[.E21]/([.E30]-1)" office:value-type="float" office:value="8.94885004599816" calcext:value-type="float">
            <text:p>8.94885004599816</text:p>
          </table:table-cell>
          <table:table-cell table:style-name="ce2"/>
          <table:table-cell table:style-name="ce2" office:value-type="float" office:value="104.03" calcext:value-type="float">
            <text:p>104.03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focal length(mm)</text:p>
          </table:table-cell>
          <table:table-cell table:style-name="ce2" table:formula="of:=[.B20]-[.B31]" office:value-type="float" office:value="8.51595919710431" calcext:value-type="float">
            <text:p>8.51595919710431</text:p>
          </table:table-cell>
          <table:table-cell table:style-name="ce2" table:formula="of:=[.C20]-[.C31]" office:value-type="float" office:value="8.50630455868089" calcext:value-type="float">
            <text:p>8.50630455868089</text:p>
          </table:table-cell>
          <table:table-cell table:style-name="ce2" table:formula="of:=[.D20]-[.D31]" office:value-type="float" office:value="8.63212719298246" calcext:value-type="float">
            <text:p>8.63212719298246</text:p>
          </table:table-cell>
          <table:table-cell table:style-name="ce2" table:formula="of:=[.E20]-[.E31]" office:value-type="float" office:value="8.59114995400184" calcext:value-type="float">
            <text:p>8.59114995400184</text:p>
          </table:table-cell>
          <table:table-cell table:style-name="ce2" table:number-columns-repeated="16379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Option 2: Point source</text:p>
          </table:table-cell>
          <table:table-cell table:style-name="ce2" table:number-columns-repeated="16383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Working distance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pointsource_to_lens (mm)</text:p>
          </table:table-cell>
          <table:table-cell table:style-name="ce2" table:formula="of:=[.J9]-[.B37]" office:value-type="float" office:value="15.48" calcext:value-type="float">
            <text:p>15.48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style-name="ce2" table:formula="of:=[.J4]" office:value-type="float" office:value="43.14" calcext:value-type="float">
            <text:p>43.1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table:formula="of:=[.J5]-[.J4]" office:value-type="float" office:value="83.78" calcext:value-type="float">
            <text:p>83.78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42]-[.B43]" office:value-type="float" office:value="0.204" calcext:value-type="float">
            <text:p>0.20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/>
          <table:table-cell table:style-name="ce2" office:value-type="string" calcext:value-type="string">
            <text:p>REMOVED FORMULA</text:p>
          </table:table-cell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formula="of:=[.C131]*1000" office:value-type="float" office:value="0.894112971921166" calcext:value-type="float">
            <text:p>0.894112971921166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48]/[.B44]" office:value-type="float" office:value="4.38290672510376" calcext:value-type="float">
            <text:p>4.38290672510376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distance_to_imageplane (mm)</text:p>
          </table:table-cell>
          <table:table-cell table:style-name="ce2" table:formula="of:=[.B41]/([.B50]-1)" office:value-type="float" office:value="24.7656843087893" calcext:value-type="float">
            <text:p>24.7656843087893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lens_to_imageplane (mm)</text:p>
          </table:table-cell>
          <table:table-cell table:style-name="ce2" table:formula="of:=[.B40]-[.B51]" office:value-type="float" office:value="18.3743156912107" calcext:value-type="float">
            <text:p>18.3743156912107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focal length (mm)</text:p>
          </table:table-cell>
          <table:table-cell table:style-name="ce2" table:formula="of:=[.B52]*[.B39]/([.B52]+[.B39])" office:value-type="float" office:value="8.40171780443894" calcext:value-type="float">
            <text:p>8.40171780443894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EXAMPLES WITH SIMULATED DATA</text:p>
          </table:table-cell>
          <table:table-cell table:style-name="ce2"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200 mesh</text:p>
          </table:table-cell>
          <table:table-cell table:style-name="ce2" office:value-type="string" calcext:value-type="string">
            <text:p>300 mesh</text:p>
          </table:table-cell>
          <table:table-cell table:style-name="ce2" office:value-type="string" calcext:value-type="string">
            <text:p>500 mesh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pointsource_to_lens (mm)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60]-[.B61]" office:value-type="float" office:value="0.101" calcext:value-type="float">
            <text:p>0.101</text:p>
          </table:table-cell>
          <table:table-cell table:style-name="ce2" table:formula="of:=[.C60]-[.C61]" office:value-type="float" office:value="0.06" calcext:value-type="float">
            <text:p>0.06</text:p>
          </table:table-cell>
          <table:table-cell table:style-name="ce2" table:formula="of:=[.D60]-[.D61]" office:value-type="float" office:value="0.028" calcext:value-type="float">
            <text:p>0.028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number-columns-repeated="3" table:style-name="ce2" office:value-type="float" office:value="0.055" calcext:value-type="float">
            <text:p>0.055</text:p>
          </table:table-cell>
          <table:table-cell table:style-name="ce2" table:number-columns-repeated="16380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B65]*[.B63]" office:value-type="float" office:value="1.87" calcext:value-type="float">
            <text:p>1.87</text:p>
          </table:table-cell>
          <table:table-cell table:style-name="ce2" table:formula="of:=[.C65]*[.C63]" office:value-type="float" office:value="1.705" calcext:value-type="float">
            <text:p>1.705</text:p>
          </table:table-cell>
          <table:table-cell table:style-name="ce2" table:formula="of:=[.D65]*[.D63]" office:value-type="float" office:value="5.5" calcext:value-type="float">
            <text:p>5.5</text:p>
          </table:table-cell>
          <table:table-cell table:style-name="ce2" table:number-columns-repeated="16380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66]/[.B62]" office:value-type="float" office:value="18.5148514851485" calcext:value-type="float">
            <text:p>18.5148514851485</text:p>
          </table:table-cell>
          <table:table-cell table:style-name="ce2" table:formula="of:=[.C66]/[.C62]" office:value-type="float" office:value="28.4166666666667" calcext:value-type="float">
            <text:p>28.4166666666667</text:p>
          </table:table-cell>
          <table:table-cell table:style-name="ce2" table:formula="of:=[.D66]/[.D62]" office:value-type="float" office:value="196.428571428571" calcext:value-type="float">
            <text:p>196.428571428571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distance_to_imageplane (mm)</text:p>
          </table:table-cell>
          <table:table-cell table:style-name="ce2" table:formula="of:=[.B59]/([.B68]-1)" office:value-type="float" office:value="5.13849632560769" calcext:value-type="float">
            <text:p>5.13849632560769</text:p>
          </table:table-cell>
          <table:table-cell table:style-name="ce2" table:formula="of:=[.C59]/([.C68]-1)" office:value-type="float" office:value="5.1063829787234" calcext:value-type="float">
            <text:p>5.1063829787234</text:p>
          </table:table-cell>
          <table:table-cell table:style-name="ce2" table:formula="of:=[.D59]/([.D68]-1)" office:value-type="float" office:value="0.741959064327485" calcext:value-type="float">
            <text:p>0.7419590643274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ens_to_imageplane (mm)</text:p>
          </table:table-cell>
          <table:table-cell table:style-name="ce2" table:formula="of:=[.B58]-[.B69]" office:value-type="float" office:value="14.8615036743923" calcext:value-type="float">
            <text:p>14.8615036743923</text:p>
          </table:table-cell>
          <table:table-cell table:style-name="ce2" table:formula="of:=[.C58]-[.C69]" office:value-type="float" office:value="14.8936170212766" calcext:value-type="float">
            <text:p>14.8936170212766</text:p>
          </table:table-cell>
          <table:table-cell table:style-name="ce2" table:formula="of:=[.D58]-[.D69]" office:value-type="float" office:value="19.2580409356725" calcext:value-type="float">
            <text:p>19.25804093567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ocal length (mm)</text:p>
          </table:table-cell>
          <table:table-cell table:style-name="ce2" table:formula="of:=[.B70]*[.B57]/([.B70]+[.B57])" office:value-type="float" office:value="8.52602562023674" calcext:value-type="float">
            <text:p>8.52602562023674</text:p>
          </table:table-cell>
          <table:table-cell table:style-name="ce2" table:formula="of:=[.C70]*[.C57]/([.C70]+[.C57])" office:value-type="float" office:value="8.53658536585366" calcext:value-type="float">
            <text:p>8.53658536585366</text:p>
          </table:table-cell>
          <table:table-cell table:style-name="ce2" table:formula="of:=[.D70]*[.D57]/([.D70]+[.D57])" office:value-type="float" office:value="8.43219886909207" calcext:value-type="float">
            <text:p>8.4321988690920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COND T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Option 1: Point source virtual image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Error propag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lepiece to lens (mm)</text:p>
          </table:table-cell>
          <table:table-cell office:value-type="float" office:value="101.48" calcext:value-type="float">
            <text:p>101.4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[.B78]+[.B79]" office:value-type="float" office:value="126.92" calcext:value-type="float">
            <text:p>126.92</text:p>
          </table:table-cell>
          <table:table-cell table:number-columns-repeated="3"/>
          <table:table-cell office:value-type="string" calcext:value-type="string">
            <text:p>Polepiece to lens (mm)</text:p>
          </table:table-cell>
          <table:table-cell table:formula="of:=SQRT(0.02)" office:value-type="float" office:value="0.14142135623731" calcext:value-type="float">
            <text:p>0.14142135623731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SQRT(2)*[.J78]" office:value-type="float" office:value="0.14142135623731" calcext:value-type="float">
            <text:p>0.141421356237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s to mesh (mm)</text:p>
          </table:table-cell>
          <table:table-cell office:value-type="float" office:value="43.14" calcext:value-type="float">
            <text:p>43.14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string" calcext:value-type="string">
            <text:p>Lens to mesh (mm)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sh to detector (mm)</text:p>
          </table:table-cell>
          <table:table-cell office:value-type="float" office:value="83.78" calcext:value-type="float">
            <text:p>83.78</text:p>
          </table:table-cell>
          <table:table-cell table:number-columns-repeated="6"/>
          <table:table-cell office:value-type="string" calcext:value-type="string">
            <text:p>Mesh to detector (mm)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orking distance (mm)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Measured pixel gap distance</text:p>
          </table:table-cell>
          <table:table-cell office:value-type="string" calcext:value-type="string">
            <text:p>Magnification</text:p>
          </table:table-cell>
          <table:table-cell office:value-type="string" calcext:value-type="string">
            <text:p>Object point position (mm)</text:p>
          </table:table-cell>
          <table:table-cell office:value-type="string" calcext:value-type="string">
            <text:p>Image point position (mm)</text:p>
          </table:table-cell>
          <table:table-cell office:value-type="string" calcext:value-type="string">
            <text:p>Focal length (mm)</text:p>
          </table:table-cell>
          <table:table-cell office:value-type="string" calcext:value-type="string">
            <text:p>s_f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s_M</text:p>
          </table:table-cell>
          <table:table-cell office:value-type="string" calcext:value-type="string">
            <text:p>s_z'</text:p>
          </table:table-cell>
          <table:table-cell office:value-type="string" calcext:value-type="string">
            <text:p>s_z</text:p>
          </table:table-cell>
          <table:table-cell table:number-columns-repeated="1637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1572974839014" calcext:value-type="float">
            <text:p>0.361572974839014</text:p>
          </table:table-cell>
          <table:table-cell table:formula="of:=[.B82]/0.055" office:value-type="float" office:value="6.57405408798207" calcext:value-type="float">
            <text:p>6.57405408798207</text:p>
          </table:table-cell>
          <table:table-cell table:formula="of:=[.B82]/[.$E$78]" office:value-type="float" office:value="1.7724165433285" calcext:value-type="float">
            <text:p>1.7724165433285</text:p>
          </table:table-cell>
          <table:table-cell table:formula="of:=[.$B$77]-[.A82]" office:value-type="float" office:value="17.48" calcext:value-type="float">
            <text:p>17.48</text:p>
          </table:table-cell>
          <table:table-cell table:formula="of:=[.$B$78]-([.$B$79])/([.D82]-1)" office:value-type="float" office:value="-65.3247923761121" calcext:value-type="float">
            <text:p>-65.3247923761121</text:p>
          </table:table-cell>
          <table:table-cell table:formula="of:=[.E82]*[.F82]/([.E82]+[.F82])" office:value-type="float" office:value="23.8662833304415" calcext:value-type="float">
            <text:p>23.8662833304415</text:p>
          </table:table-cell>
          <table:table-cell table:formula="of:=SQRT(([.L82]^2*[.F82]^4+[.K82]^2*[.E82]^4)/([.E82]+[.F82])^4)" office:value-type="float" office:value="2.00970633638712" calcext:value-type="float">
            <text:p>2.00970633638712</text:p>
          </table:table-cell>
          <table:table-cell office:value-type="float" office:value="0.00737401934679888" calcext:value-type="float">
            <text:p>0.00737401934679888</text:p>
          </table:table-cell>
          <table:table-cell table:formula="of:=[.I82]/[.$E$78]" office:value-type="float" office:value="0.0361471536607788" calcext:value-type="float">
            <text:p>0.0361471536607788</text:p>
          </table:table-cell>
          <table:table-cell table:formula="of:=SQRT([.$J$78]^2+([.$J$79]/([.D82]-1))^2+([.J82]*[.$B$79]/([.D82]-1)^2)^2)" office:value-type="float" office:value="5.07851518256439" calcext:value-type="float">
            <text:p>5.07851518256439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02131188437875" calcext:value-type="float">
            <text:p>0.402131188437875</text:p>
          </table:table-cell>
          <table:table-cell table:formula="of:=[.B83]/0.055" office:value-type="float" office:value="7.31147615341591" calcext:value-type="float">
            <text:p>7.31147615341591</text:p>
          </table:table-cell>
          <table:table-cell table:formula="of:=[.B83]/[.$E$78]" office:value-type="float" office:value="1.97123131587194" calcext:value-type="float">
            <text:p>1.97123131587194</text:p>
          </table:table-cell>
          <table:table-cell table:formula="of:=[.$B$77]-[.A83]" office:value-type="float" office:value="15.48" calcext:value-type="float">
            <text:p>15.48</text:p>
          </table:table-cell>
          <table:table-cell table:formula="of:=[.$B$78]-([.$B$79])/([.D83]-1)" office:value-type="float" office:value="-43.1216336920575" calcext:value-type="float">
            <text:p>-43.1216336920575</text:p>
          </table:table-cell>
          <table:table-cell table:formula="of:=[.E83]*[.F83]/([.E83]+[.F83])" office:value-type="float" office:value="24.1491836911526" calcext:value-type="float">
            <text:p>24.1491836911526</text:p>
          </table:table-cell>
          <table:table-cell table:formula="of:=SQRT(([.L83]^2*[.F83]^4+[.K83]^2*[.E83]^4)/([.E83]+[.F83])^4)" office:value-type="float" office:value="2.62281991437432" calcext:value-type="float">
            <text:p>2.62281991437432</text:p>
          </table:table-cell>
          <table:table-cell office:value-type="float" office:value="0.00645422711777111" calcext:value-type="float">
            <text:p>0.00645422711777111</text:p>
          </table:table-cell>
          <table:table-cell table:formula="of:=[.I83]/[.$E$78]" office:value-type="float" office:value="0.0316383682243682" calcext:value-type="float">
            <text:p>0.0316383682243682</text:p>
          </table:table-cell>
          <table:table-cell table:formula="of:=SQRT([.$J$78]^2+([.$J$79]/([.D83]-1))^2+([.J83]*[.$B$79]/([.D83]-1)^2)^2)" office:value-type="float" office:value="2.81368112738702" calcext:value-type="float">
            <text:p>2.81368112738702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9782960180849" calcext:value-type="float">
            <text:p>0.459782960180849</text:p>
          </table:table-cell>
          <table:table-cell table:formula="of:=[.B84]/0.055" office:value-type="float" office:value="8.35969018510635" calcext:value-type="float">
            <text:p>8.35969018510635</text:p>
          </table:table-cell>
          <table:table-cell table:formula="of:=[.B84]/[.$E$78]" office:value-type="float" office:value="2.2538380401022" calcext:value-type="float">
            <text:p>2.2538380401022</text:p>
          </table:table-cell>
          <table:table-cell table:formula="of:=[.$B$77]-[.A84]" office:value-type="float" office:value="13.48" calcext:value-type="float">
            <text:p>13.48</text:p>
          </table:table-cell>
          <table:table-cell table:formula="of:=[.$B$78]-([.$B$79])/([.D84]-1)" office:value-type="float" office:value="-23.6788372982934" calcext:value-type="float">
            <text:p>-23.6788372982934</text:p>
          </table:table-cell>
          <table:table-cell table:formula="of:=[.E84]*[.F84]/([.E84]+[.F84])" office:value-type="float" office:value="31.2967760388144" calcext:value-type="float">
            <text:p>31.2967760388144</text:p>
          </table:table-cell>
          <table:table-cell table:formula="of:=SQRT(([.L84]^2*[.F84]^4+[.K84]^2*[.E84]^4)/([.E84]+[.F84])^4)" office:value-type="float" office:value="8.14307409998785" calcext:value-type="float">
            <text:p>8.14307409998785</text:p>
          </table:table-cell>
          <table:table-cell office:value-type="float" office:value="0.0132080262050626" calcext:value-type="float">
            <text:p>0.0132080262050626</text:p>
          </table:table-cell>
          <table:table-cell table:formula="of:=[.I84]/[.$E$78]" office:value-type="float" office:value="0.0647452264954049" calcext:value-type="float">
            <text:p>0.0647452264954049</text:p>
          </table:table-cell>
          <table:table-cell table:formula="of:=SQRT([.$J$78]^2+([.$J$79]/([.D84]-1))^2+([.J84]*[.$B$79]/([.D84]-1)^2)^2)" office:value-type="float" office:value="3.45273656405257" calcext:value-type="float">
            <text:p>3.45273656405257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88057772717554" calcext:value-type="float">
            <text:p>0.488057772717554</text:p>
          </table:table-cell>
          <table:table-cell table:formula="of:=[.B85]/0.055" office:value-type="float" office:value="8.87377768577371" calcext:value-type="float">
            <text:p>8.87377768577371</text:p>
          </table:table-cell>
          <table:table-cell table:formula="of:=[.B85]/[.$E$78]" office:value-type="float" office:value="2.39244006234095" calcext:value-type="float">
            <text:p>2.39244006234095</text:p>
          </table:table-cell>
          <table:table-cell table:formula="of:=[.$B$77]-[.A85]" office:value-type="float" office:value="11.48" calcext:value-type="float">
            <text:p>11.48</text:p>
          </table:table-cell>
          <table:table-cell table:formula="of:=[.$B$78]-([.$B$79])/([.D85]-1)" office:value-type="float" office:value="-17.0277603696278" calcext:value-type="float">
            <text:p>-17.0277603696278</text:p>
          </table:table-cell>
          <table:table-cell table:formula="of:=[.E85]*[.F85]/([.E85]+[.F85])" office:value-type="float" office:value="35.2356042833986" calcext:value-type="float">
            <text:p>35.2356042833986</text:p>
          </table:table-cell>
          <table:table-cell table:formula="of:=SQRT(([.L85]^2*[.F85]^4+[.K85]^2*[.E85]^4)/([.E85]+[.F85])^4)" office:value-type="float" office:value="10.1908418287306" calcext:value-type="float">
            <text:p>10.1908418287306</text:p>
          </table:table-cell>
          <table:table-cell office:value-type="float" office:value="0.0038454369348915" calcext:value-type="float">
            <text:p>0.0038454369348915</text:p>
          </table:table-cell>
          <table:table-cell table:formula="of:=[.I85]/[.$E$78]" office:value-type="float" office:value="0.0188501810533897" calcext:value-type="float">
            <text:p>0.0188501810533897</text:p>
          </table:table-cell>
          <table:table-cell table:formula="of:=SQRT([.$J$78]^2+([.$J$79]/([.D85]-1))^2+([.J85]*[.$B$79]/([.D85]-1)^2)^2)" office:value-type="float" office:value="0.823774126550098" calcext:value-type="float">
            <text:p>0.823774126550098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7091166921696" calcext:value-type="float">
            <text:p>0.517091166921696</text:p>
          </table:table-cell>
          <table:table-cell table:formula="of:=[.B86]/0.055" office:value-type="float" office:value="9.40165758039447" calcext:value-type="float">
            <text:p>9.40165758039447</text:p>
          </table:table-cell>
          <table:table-cell table:formula="of:=[.B86]/[.$E$78]" office:value-type="float" office:value="2.53476062216518" calcext:value-type="float">
            <text:p>2.53476062216518</text:p>
          </table:table-cell>
          <table:table-cell table:formula="of:=[.$B$77]-[.A86]" office:value-type="float" office:value="9.48" calcext:value-type="float">
            <text:p>9.48</text:p>
          </table:table-cell>
          <table:table-cell table:formula="of:=[.$B$78]-([.$B$79])/([.D86]-1)" office:value-type="float" office:value="-11.4483174157848" calcext:value-type="float">
            <text:p>-11.4483174157848</text:p>
          </table:table-cell>
          <table:table-cell table:formula="of:=[.E86]*[.F86]/([.E86]+[.F86])" office:value-type="float" office:value="55.1384894688686" calcext:value-type="float">
            <text:p>55.1384894688686</text:p>
          </table:table-cell>
          <table:table-cell table:formula="of:=SQRT(([.L86]^2*[.F86]^4+[.K86]^2*[.E86]^4)/([.E86]+[.F86])^4)" office:value-type="float" office:value="35.524355486855" calcext:value-type="float">
            <text:p>35.524355486855</text:p>
          </table:table-cell>
          <table:table-cell office:value-type="float" office:value="0.0021492706006442" calcext:value-type="float">
            <text:p>0.0021492706006442</text:p>
          </table:table-cell>
          <table:table-cell table:formula="of:=[.I86]/[.$E$78]" office:value-type="float" office:value="0.0105356401992363" calcext:value-type="float">
            <text:p>0.0105356401992363</text:p>
          </table:table-cell>
          <table:table-cell table:formula="of:=SQRT([.$J$78]^2+([.$J$79]/([.D86]-1))^2+([.J86]*[.$B$79]/([.D86]-1)^2)^2)" office:value-type="float" office:value="0.393279750124981" calcext:value-type="float">
            <text:p>0.393279750124981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57878139017513" calcext:value-type="float">
            <text:p>0.557878139017513</text:p>
          </table:table-cell>
          <table:table-cell table:formula="of:=[.B87]/0.055" office:value-type="float" office:value="10.1432388912275" calcext:value-type="float">
            <text:p>10.1432388912275</text:p>
          </table:table-cell>
          <table:table-cell table:formula="of:=[.B87]/[.$E$78]" office:value-type="float" office:value="2.73469675988977" calcext:value-type="float">
            <text:p>2.73469675988977</text:p>
          </table:table-cell>
          <table:table-cell table:formula="of:=[.$B$77]-[.A87]" office:value-type="float" office:value="6.48" calcext:value-type="float">
            <text:p>6.48</text:p>
          </table:table-cell>
          <table:table-cell table:formula="of:=[.$B$78]-([.$B$79])/([.D87]-1)" office:value-type="float" office:value="-5.15662563347599" calcext:value-type="float">
            <text:p>-5.15662563347599</text:p>
          </table:table-cell>
          <table:table-cell table:formula="of:=[.E87]*[.F87]/([.E87]+[.F87])" office:value-type="float" office:value="-25.249796996365" calcext:value-type="float">
            <text:p>-25.249796996365</text:p>
          </table:table-cell>
          <table:table-cell table:formula="of:=SQRT(([.L87]^2*[.F87]^4+[.K87]^2*[.E87]^4)/([.E87]+[.F87])^4)" office:value-type="float" office:value="23.2735068177582" calcext:value-type="float">
            <text:p>23.2735068177582</text:p>
          </table:table-cell>
          <table:table-cell office:value-type="float" office:value="0.00526260203830513" calcext:value-type="float">
            <text:p>0.00526260203830513</text:p>
          </table:table-cell>
          <table:table-cell table:formula="of:=[.I87]/[.$E$78]" office:value-type="float" office:value="0.0257970688152212" calcext:value-type="float">
            <text:p>0.0257970688152212</text:p>
          </table:table-cell>
          <table:table-cell table:formula="of:=SQRT([.$J$78]^2+([.$J$79]/([.D87]-1))^2+([.J87]*[.$B$79]/([.D87]-1)^2)^2)" office:value-type="float" office:value="0.727445946838881" calcext:value-type="float">
            <text:p>0.727445946838881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matrix-columns-spanned="1" table:number-matrix-rows-spanned="1" table:formula="of:=SUM([.G82:.G87]/[.H82:.H87]^2)/SUM(1/[.H82:.H87]^2)" office:value-type="float" office:value="24.3344170646672" calcext:value-type="float">
            <text:p>24.33441706466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</text:p>
          </table:table-cell>
          <table:table-cell table:number-matrix-columns-spanned="1" table:number-matrix-rows-spanned="1" table:formula="of:=SQRT(1/SUM(1/[.H82:.H87]^2))" office:value-type="float" office:value="1.54247286578149" calcext:value-type="float">
            <text:p>1.5424728657814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Option 2: Parallel beam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Error propag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lepiece to lens (mm)</text:p>
          </table:table-cell>
          <table:table-cell office:value-type="float" office:value="101.48" calcext:value-type="float">
            <text:p>101.4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[.B95]+[.B96]" office:value-type="float" office:value="126.92" calcext:value-type="float">
            <text:p>126.92</text:p>
          </table:table-cell>
          <table:table-cell table:number-columns-repeated="3"/>
          <table:table-cell office:value-type="string" calcext:value-type="string">
            <text:p>Polepiece to lens (mm)</text:p>
          </table:table-cell>
          <table:table-cell table:formula="of:=SQRT(3)*[.J95]" office:value-type="float" office:value="0.173205080756888" calcext:value-type="float">
            <text:p>0.17320508075688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SQRT(2)*[.J95]" office:value-type="float" office:value="0.14142135623731" calcext:value-type="float">
            <text:p>0.141421356237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s to mesh (mm)</text:p>
          </table:table-cell>
          <table:table-cell office:value-type="float" office:value="43.14" calcext:value-type="float">
            <text:p>43.14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string" calcext:value-type="string">
            <text:p>Lens to mesh (mm)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sh to detector (mm)</text:p>
          </table:table-cell>
          <table:table-cell office:value-type="float" office:value="83.78" calcext:value-type="float">
            <text:p>83.78</text:p>
          </table:table-cell>
          <table:table-cell table:number-columns-repeated="6"/>
          <table:table-cell office:value-type="string" calcext:value-type="string">
            <text:p>Mesh to detector (mm)</text:p>
          </table:table-cell>
          <table:table-cell office:value-type="float" office:value="0.1" calcext:value-type="float">
            <text:p>0.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Measured pixel gap distance</text:p>
          </table:table-cell>
          <table:table-cell office:value-type="string" calcext:value-type="string">
            <text:p>Magnification</text:p>
          </table:table-cell>
          <table:table-cell/>
          <table:table-cell office:value-type="string" calcext:value-type="string">
            <text:p>Focal length (mm)</text:p>
          </table:table-cell>
          <table:table-cell office:value-type="string" calcext:value-type="string">
            <text:p>s_f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s_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270" calcext:value-type="float">
            <text:p>270</text:p>
          </table:table-cell>
          <table:table-cell office:value-type="float" office:value="0.844612029769118" calcext:value-type="float">
            <text:p>0.844612029769118</text:p>
          </table:table-cell>
          <table:table-cell table:formula="of:=[.C100]/0.055" office:value-type="float" office:value="14.8521180738586" calcext:value-type="float">
            <text:p>14.8521180738586</text:p>
          </table:table-cell>
          <table:table-cell table:formula="of:=[.C100]/[.$E$78]" office:value-type="float" office:value="4.00424751991285" calcext:value-type="float">
            <text:p>4.00424751991285</text:p>
          </table:table-cell>
          <table:table-cell/>
          <table:table-cell table:formula="of:=[.$B$95]-([.$B$96])/([.E99]-1)" office:value-type="float" office:value="15.2528171215299" calcext:value-type="float">
            <text:p>15.2528171215299</text:p>
          </table:table-cell>
          <table:table-cell table:formula="of:=SQRT([.$J$95]^2+([.$J$96]/([.E99]-1))^2+([.J99]*[.$B$96]/([.E99]-1)^2)^2)" office:value-type="float" office:value="0.475171725241049" calcext:value-type="float">
            <text:p>0.475171725241049</text:p>
          </table:table-cell>
          <table:table-cell office:value-type="float" office:value="0.0101825658334725" calcext:value-type="float">
            <text:p>0.0101825658334725</text:p>
          </table:table-cell>
          <table:table-cell table:formula="of:=[.I99]/[.$E$78]" office:value-type="float" office:value="0.049914538399375" calcext:value-type="float">
            <text:p>0.0499145383993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verview 1</text:p>
          </table:table-cell>
          <table:table-cell office:value-type="float" office:value="270" calcext:value-type="float">
            <text:p>270</text:p>
          </table:table-cell>
          <table:table-cell office:value-type="float" office:value="0.816866494062222" calcext:value-type="float">
            <text:p>0.816866494062222</text:p>
          </table:table-cell>
          <table:table-cell table:formula="of:=[.C101]/0.055" office:value-type="float" office:value="15.7089068370936" calcext:value-type="float">
            <text:p>15.7089068370936</text:p>
          </table:table-cell>
          <table:table-cell table:formula="of:=[.C101]/[.$E$78]" office:value-type="float" office:value="4.23524449039287" calcext:value-type="float">
            <text:p>4.23524449039287</text:p>
          </table:table-cell>
          <table:table-cell/>
          <table:table-cell table:formula="of:=[.$B$95]-([.$B$96])/([.E100]-1)" office:value-type="float" office:value="17.2439664084781" calcext:value-type="float">
            <text:p>17.2439664084781</text:p>
          </table:table-cell>
          <table:table-cell table:formula="of:=SQRT([.$J$95]^2+([.$J$96]/([.E100]-1))^2+([.J100]*[.$B$96]/([.E100]-1)^2)^2)" office:value-type="float" office:value="2.44546648080008" calcext:value-type="float">
            <text:p>2.44546648080008</text:p>
          </table:table-cell>
          <table:table-cell office:value-type="float" office:value="0.0622683816725" calcext:value-type="float">
            <text:p>0.0622683816725</text:p>
          </table:table-cell>
          <table:table-cell table:formula="of:=[.I100]/[.$E$78]" office:value-type="float" office:value="0.305237165061275" calcext:value-type="float">
            <text:p>0.3052371650612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verview 2</text:p>
          </table:table-cell>
          <table:table-cell office:value-type="float" office:value="270" calcext:value-type="float">
            <text:p>270</text:p>
          </table:table-cell>
          <table:table-cell office:value-type="float" office:value="0.863989876040146" calcext:value-type="float">
            <text:p>0.863989876040146</text:p>
          </table:table-cell>
          <table:table-cell table:formula="of:=[.C99]/0.055" office:value-type="float" office:value="15.3565823594385" calcext:value-type="float">
            <text:p>15.3565823594385</text:p>
          </table:table-cell>
          <table:table-cell table:formula="of:=[.C99]/[.$E$78]" office:value-type="float" office:value="4.14025504788783" calcext:value-type="float">
            <text:p>4.14025504788783</text:p>
          </table:table-cell>
          <table:table-cell/>
          <table:table-cell table:formula="of:=[.$B$95]-([.$B$96])/([.E101]-1)" office:value-type="float" office:value="16.460638380519" calcext:value-type="float">
            <text:p>16.460638380519</text:p>
          </table:table-cell>
          <table:table-cell table:formula="of:=SQRT([.$J$95]^2+([.$J$96]/([.E101]-1))^2+([.J101]*[.$B$96]/([.E101]-1)^2)^2)" office:value-type="float" office:value="0.374103254225225" calcext:value-type="float">
            <text:p>0.374103254225225</text:p>
          </table:table-cell>
          <table:table-cell office:value-type="float" office:value="0.00862208084550997" calcext:value-type="float">
            <text:p>0.00862208084550997</text:p>
          </table:table-cell>
          <table:table-cell table:formula="of:=[.I101]/[.$E$78]" office:value-type="float" office:value="0.0422651021838724" calcext:value-type="float">
            <text:p>0.042265102183872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matrix-columns-spanned="1" table:number-matrix-rows-spanned="1" table:formula="of:=SUM([.G99:.G101]/[.H99:.H101]^2)/SUM(1/[.H99:.H101]^2)" office:value-type="float" office:value="16.0161959668692" calcext:value-type="float">
            <text:p>16.01619596686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</text:p>
          </table:table-cell>
          <table:table-cell table:number-matrix-columns-spanned="1" table:number-matrix-rows-spanned="1" table:formula="of:=SQRT(1/SUM(1/[.H99:.H101]^2))" office:value-type="float" office:value="0.291836939668803" calcext:value-type="float">
            <text:p>0.291836939668803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nd +- another mm if we take into account that the beam is focussed at 270</text:p>
          </table:table-cell>
          <table:table-cell table:number-columns-repeated="16382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office:value-type="string" calcext:value-type="string">
            <text:p>Resolution shadows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gap distance (m)</text:p>
          </table:table-cell>
          <table:table-cell office:value-type="string" calcext:value-type="string">
            <text:p>stderror (m)</text:p>
          </table:table-cell>
          <table:table-cell office:value-type="string" calcext:value-type="string">
            <text:p>Focal length(mm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0427016030434391" calcext:value-type="float">
            <text:p>0.000427016030434391</text:p>
          </table:table-cell>
          <table:table-cell table:style-name="ce4" office:value-type="float" office:value="0.00000951615586632676" calcext:value-type="float">
            <text:p>9.52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0510316436883322" calcext:value-type="float">
            <text:p>0.000510316436883322</text:p>
          </table:table-cell>
          <table:table-cell table:style-name="ce4" office:value-type="float" office:value="0.0000204769794740553" calcext:value-type="float">
            <text:p>2.0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49354032641543" calcext:value-type="float">
            <text:p>0.00049354032641543</text:p>
          </table:table-cell>
          <table:table-cell table:style-name="ce4" office:value-type="float" office:value="0.0000142915207469048" calcext:value-type="float">
            <text:p>1.43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0523987951500058" calcext:value-type="float">
            <text:p>0.000523987951500058</text:p>
          </table:table-cell>
          <table:table-cell table:style-name="ce4" office:value-type="float" office:value="0.00000632844830703717" calcext:value-type="float">
            <text:p>6.33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0542653000283127" calcext:value-type="float">
            <text:p>0.000542653000283127</text:p>
          </table:table-cell>
          <table:table-cell table:style-name="ce4" office:value-type="float" office:value="0.00000526069401384371" calcext:value-type="float">
            <text:p>5.26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0087129160818606" calcext:value-type="float">
            <text:p>0.00087129160818606</text:p>
          </table:table-cell>
          <table:table-cell table:style-name="ce4" office:value-type="float" office:value="0.0000132418724502264" calcext:value-type="float">
            <text:p>1.32E-05</text:p>
          </table:table-cell>
          <table:table-cell office:value-type="float" office:value="17.5273296317035" calcext:value-type="float">
            <text:p>17.52732963170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view shadows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)</text:p>
          </table:table-cell>
          <table:table-cell office:value-type="string" calcext:value-type="string">
            <text:p>stderror (m)</text:p>
          </table:table-cell>
          <table:table-cell office:value-type="string" calcext:value-type="string">
            <text:p>calculated focal length (mm)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70 (parallel)</text:p>
          </table:table-cell>
          <table:table-cell office:value-type="float" office:value="0.000863191851886767" calcext:value-type="float">
            <text:p>0.000863191851886767</text:p>
          </table:table-cell>
          <table:table-cell table:style-name="ce4" office:value-type="float" office:value="0.0000100227825556606" calcext:value-type="float">
            <text:p>1.00E-05</text:p>
          </table:table-cell>
          <table:table-cell office:value-type="float" office:value="17.2126164149616" calcext:value-type="float">
            <text:p>17.21261641496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973008241135106" calcext:value-type="float">
            <text:p>0.000973008241135106</text:p>
          </table:table-cell>
          <table:table-cell table:style-name="ce4" office:value-type="float" office:value="0.0000191063404054982" calcext:value-type="float">
            <text:p>1.91E-05</text:p>
          </table:table-cell>
          <table:table-cell office:value-type="float" office:value="17.0231125561589" calcext:value-type="float">
            <text:p>17.0231125561589</text:p>
          </table:table-cell>
          <table:table-cell table:style-name="ce5"/>
          <table:table-cell table:style-name="ce6" office:value-type="string" calcext:value-type="string">
            <text:p>Stray electron image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978552440249185" calcext:value-type="float">
            <text:p>0.000978552440249185</text:p>
          </table:table-cell>
          <table:table-cell table:style-name="ce4" office:value-type="float" office:value="0.0000361794190941127" calcext:value-type="float">
            <text:p>3.62E-05</text:p>
          </table:table-cell>
          <table:table-cell office:value-type="float" office:value="13.9744060170369" calcext:value-type="float">
            <text:p>13.974406017036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0970200970076369" calcext:value-type="float">
            <text:p>0.000970200970076369</text:p>
          </table:table-cell>
          <table:table-cell table:style-name="ce4" office:value-type="float" office:value="0.0000230853149320168" calcext:value-type="float">
            <text:p>2.31E-05</text:p>
          </table:table-cell>
          <table:table-cell office:value-type="float" office:value="13.2605822608214" calcext:value-type="float">
            <text:p>13.26058226082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912745917402514" calcext:value-type="float">
            <text:p>0.000912745917402514</text:p>
          </table:table-cell>
          <table:table-cell table:style-name="ce4" office:value-type="float" office:value="0.0000195929185300217" calcext:value-type="float">
            <text:p>1.96E-05</text:p>
          </table:table-cell>
          <table:table-cell office:value-type="float" office:value="11.858528217554" calcext:value-type="float">
            <text:p>11.85852821755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0894112971921166" calcext:value-type="float">
            <text:p>0.000894112971921166</text:p>
          </table:table-cell>
          <table:table-cell table:style-name="ce4" office:value-type="float" office:value="0.0000181234036675559" calcext:value-type="float">
            <text:p>1.81E-05</text:p>
          </table:table-cell>
          <table:table-cell office:value-type="float" office:value="10.8473816176979" calcext:value-type="float">
            <text:p>10.8473816176979</text:p>
          </table:table-cell>
          <table:table-cell table:style-name="ce5"/>
          <table:table-cell table:number-columns-repeated="16378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Des De Borger</meta:initial-creator>
    <meta:creation-date>2026-03-31T08:36:37Z</meta:creation-date>
    <dc:date>2026-05-01T22:58:23.947741405</dc:date>
    <meta:editing-cycles>3</meta:editing-cycles>
    <meta:editing-duration>PT2H16M41S</meta:editing-duration>
    <meta:document-statistic meta:table-count="1" meta:cell-count="466" meta:object-count="0"/>
    <meta:user-defined meta:name="AppVersion">16.0300</meta:user-defined>
  </office:meta>
</office:document-meta>
</file>